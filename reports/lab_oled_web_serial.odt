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A0042277F1E.jpg" manifest:media-type="image/jpeg"/>
  <manifest:file-entry manifest:full-path="Pictures/1000000000000A0000000780400075E5.jpg" manifest:media-type="image/jpeg"/>
  <manifest:file-entry manifest:full-path="Pictures/1000000000000A0000000780CBA5E0FB.jpg" manifest:media-type="image/jpeg"/>
  <manifest:file-entry manifest:full-path="Pictures/1000000000000A000000078097A098E7.jpg" manifest:media-type="image/jpeg"/>
  <manifest:file-entry manifest:full-path="Pictures/1000000000000A00000007802963BDE2.jpg" manifest:media-type="image/jpeg"/>
  <manifest:file-entry manifest:full-path="Pictures/1000000000000A0000000780FFA4E6F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2" style:family="table">
      <style:table-properties style:width="6.6972in" fo:margin-left="0.0007in" fo:margin-top="0in" fo:margin-bottom="0in" table:align="left" style:writing-mode="page"/>
    </style:style>
    <style:style style:name="Table2.A" style:family="table-column">
      <style:table-column-properties style:column-width="6.6972in"/>
    </style:style>
    <style:style style:name="Table2.1" style:family="table-row">
      <style:table-row-properties style:row-height="0.866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6.6972in" fo:margin-left="0.0007in" fo:margin-top="0in" fo:margin-bottom="0in" table:align="left" style:writing-mode="page"/>
    </style:style>
    <style:style style:name="Table3.A" style:family="table-column">
      <style:table-column-properties style:column-width="2.2639in"/>
    </style:style>
    <style:style style:name="Table3.B" style:family="table-column">
      <style:table-column-properties style:column-width="0.1972in"/>
    </style:style>
    <style:style style:name="Table3.C" style:family="table-column">
      <style:table-column-properties style:column-width="1.9667in"/>
    </style:style>
    <style:style style:name="Table3.D" style:family="table-column">
      <style:table-column-properties style:column-width="0.1639in"/>
    </style:style>
    <style:style style:name="Table3.E" style:family="table-column">
      <style:table-column-properties style:column-width="2.105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3.B1" style:family="table-cell">
      <style:table-cell-properties style:vertical-align="middle" fo:padding-left="0.075in" fo:padding-right="0.075in" fo:padding-top="0in" fo:padding-bottom="0in" fo:border="none"/>
    </style:style>
    <style:style style:name="Table4" style:family="table">
      <style:table-properties style:width="6.6938in" fo:margin-left="0.0007in" fo:margin-top="0in" fo:margin-bottom="0in" table:align="left" style:writing-mode="page"/>
    </style:style>
    <style:style style:name="Table4.A" style:family="table-column">
      <style:table-column-properties style:column-width="6.69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4.A2" style:family="table-cell">
      <style:table-cell-properties fo:padding-left="0.075in" fo:padding-right="0.075in" fo:padding-top="0in" fo:padding-bottom="0in" fo:border="none"/>
    </style:style>
    <style:style style:name="Table4.3" style:family="table-row">
      <style:table-row-properties style:min-row-height="0.7875in" fo:keep-together="auto"/>
    </style:style>
    <style:style style:name="Table4.A3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6938in" fo:margin-left="0.0007in" fo:margin-top="0in" fo:margin-bottom="0in" table:align="left" style:writing-mode="page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1.0819in"/>
    </style:style>
    <style:style style:name="Table5.C" style:family="table-column">
      <style:table-column-properties style:column-width="0.1646in"/>
    </style:style>
    <style:style style:name="Table5.D" style:family="table-column">
      <style:table-column-properties style:column-width="1.8326in"/>
    </style:style>
    <style:style style:name="Table5.E" style:family="table-column">
      <style:table-column-properties style:column-width="0.1639in"/>
    </style:style>
    <style:style style:name="Table5.F" style:family="table-column">
      <style:table-column-properties style:column-width="1.8257in"/>
    </style:style>
    <style:style style:name="Table5.1" style:family="table-row">
      <style:table-row-properties style:min-row-height="0.2361in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none"/>
    </style:style>
    <style:style style:name="Table5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5.2" style:family="table-row">
      <style:table-row-properties style:min-row-height="0.116in" fo:keep-together="auto"/>
    </style:style>
    <style:style style:name="Table5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5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/>
    </style:style>
    <style:style style:name="Table5.3" style:family="table-row">
      <style:table-row-properties style:min-row-height="0.4403in" fo:keep-together="auto"/>
    </style:style>
    <style:style style:name="Table1" style:family="table">
      <style:table-properties style:width="6.5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2.1667in" style:rel-column-width="21845*"/>
    </style:style>
    <style:style style:name="Table1.B" style:family="table-column">
      <style:table-column-properties style:column-width="2.1667in" style:rel-column-width="21847*"/>
    </style:style>
    <style:style style:name="Table1.C" style:family="table-column">
      <style:table-column-properties style:column-width="2.1667in" style:rel-column-width="21843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1.A2" style:family="table-cell">
      <style:table-cell-properties fo:padding-left="0.075in" fo:padding-right="0.075in" fo:padding-top="0in" fo:padding-bottom="0in" fo:border="none" style:writing-mode="lr-tb"/>
    </style:style>
    <style:style style:name="Table1.B2" style:family="table-cell">
      <style:table-cell-properties fo:padding-left="0.075in" fo:padding-right="0.075in" fo:padding-top="0in" fo:padding-bottom="0in" fo:border="none" style:writing-mode="lr-tb"/>
    </style:style>
    <style:style style:name="Table1.C2" style:family="table-cell">
      <style:table-cell-properties fo:padding-left="0.075in" fo:padding-right="0.075in" fo:padding-top="0in" fo:padding-bottom="0in" fo:border="none" style:writing-mode="lr-tb"/>
    </style:style>
    <style:style style:name="Table1.A3" style:family="table-cell">
      <style:table-cell-properties fo:padding-left="0.075in" fo:padding-right="0.075in" fo:padding-top="0in" fo:padding-bottom="0in" fo:border="none" style:writing-mode="lr-tb"/>
    </style:style>
    <style:style style:name="Table1.B3" style:family="table-cell">
      <style:table-cell-properties fo:padding-left="0.075in" fo:padding-right="0.075in" fo:padding-top="0in" fo:padding-bottom="0in" fo:border="none" style:writing-mode="lr-tb"/>
    </style:style>
    <style:style style:name="Table1.C3" style:family="table-cell">
      <style:table-cell-properties fo:padding-left="0.075in" fo:padding-right="0.075in" fo:padding-top="0in" fo:padding-bottom="0in" fo:border="none" style:writing-mode="lr-tb"/>
    </style:style>
    <style:style style:name="Table1.A4" style:family="table-cell">
      <style:table-cell-properties fo:padding-left="0.075in" fo:padding-right="0.075in" fo:padding-top="0in" fo:padding-bottom="0in" fo:border="none" style:writing-mode="lr-tb"/>
    </style:style>
    <style:style style:name="Table1.B4" style:family="table-cell">
      <style:table-cell-properties fo:padding-left="0.075in" fo:padding-right="0.075in" fo:padding-top="0in" fo:padding-bottom="0in" fo:border="none" style:writing-mode="lr-tb"/>
    </style:style>
    <style:style style:name="Table1.C4" style:family="table-cell">
      <style:table-cell-properties fo:padding-left="0.075in" fo:padding-right="0.075in" fo:padding-top="0in" fo:padding-bottom="0in" fo:border="none" style:writing-mode="lr-tb"/>
    </style:style>
    <style:style style:name="Table1.A5" style:family="table-cell">
      <style:table-cell-properties fo:padding-left="0.075in" fo:padding-right="0.075in" fo:padding-top="0in" fo:padding-bottom="0in" fo:border="none" style:writing-mode="lr-tb"/>
    </style:style>
    <style:style style:name="Table1.B5" style:family="table-cell">
      <style:table-cell-properties fo:padding-left="0.075in" fo:padding-right="0.075in" fo:padding-top="0in" fo:padding-bottom="0in" fo:border="none" style:writing-mode="lr-tb"/>
    </style:style>
    <style:style style:name="Table1.C5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-0.1972in" fo:text-align="center" style:justify-single-word="false" fo:orphans="0" fo:widows="0"/>
      <style:text-properties officeooo:paragraph-rsid="0004aeb3"/>
    </style:style>
    <style:style style:name="P2" style:family="paragraph" style:parent-style-name="Standard">
      <style:paragraph-properties fo:margin-left="-0.2957in" fo:text-align="center" style:justify-single-word="false" fo:orphans="0" fo:widows="0"/>
      <style:text-properties officeooo:paragraph-rsid="0004aeb3"/>
    </style:style>
    <style:style style:name="P3" style:family="paragraph" style:parent-style-name="Standard">
      <style:paragraph-properties fo:margin-top="0.0972in" fo:margin-bottom="0in" style:contextual-spacing="false" fo:text-align="center" style:justify-single-word="false" fo:orphans="0" fo:widows="0"/>
      <style:text-properties fo:font-size="10pt" officeooo:paragraph-rsid="0004aeb3" style:font-size-asian="10pt" style:font-size-complex="10pt"/>
    </style:style>
    <style:style style:name="P4" style:family="paragraph" style:parent-style-name="Standard">
      <style:paragraph-properties fo:margin-top="0.0972in" fo:margin-bottom="0in" style:contextual-spacing="false" fo:text-align="center" style:justify-single-word="false" fo:orphans="0" fo:widows="0"/>
      <style:text-properties officeooo:paragraph-rsid="0004aeb3"/>
    </style:style>
    <style:style style:name="P5" style:family="paragraph" style:parent-style-name="Standard">
      <style:paragraph-properties fo:orphans="0" fo:widows="0"/>
      <style:text-properties officeooo:paragraph-rsid="0004aeb3"/>
    </style:style>
    <style:style style:name="P6" style:family="paragraph" style:parent-style-name="Standard">
      <style:paragraph-properties fo:margin-top="0.139in" fo:margin-bottom="0in" style:contextual-spacing="false" fo:line-height="150%" fo:orphans="0" fo:widows="0"/>
      <style:text-properties officeooo:paragraph-rsid="0004aeb3"/>
    </style:style>
    <style:style style:name="P7" style:family="paragraph" style:parent-style-name="Standard">
      <style:paragraph-properties fo:margin-top="0.0972in" fo:margin-bottom="0in" style:contextual-spacing="false" fo:text-align="center" style:justify-single-word="false" fo:orphans="0" fo:widows="0"/>
      <style:text-properties officeooo:rsid="0004aeb3" officeooo:paragraph-rsid="0004aeb3"/>
    </style:style>
    <style:style style:name="P8" style:family="paragraph" style:parent-style-name="Standard">
      <style:paragraph-properties fo:line-height="0.1252in" fo:text-align="center" style:justify-single-word="false" fo:orphans="0" fo:widows="0"/>
      <style:text-properties officeooo:paragraph-rsid="0004aeb3"/>
    </style:style>
    <style:style style:name="P9" style:family="paragraph" style:parent-style-name="Standard">
      <style:paragraph-properties fo:line-height="0.1252in" fo:orphans="0" fo:widows="0"/>
      <style:text-properties fo:font-size="11pt" officeooo:paragraph-rsid="0004aeb3" style:font-size-asian="11pt" style:font-size-complex="11pt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04aeb3"/>
    </style:style>
    <style:style style:name="P11" style:family="paragraph" style:parent-style-name="Text_20_body">
      <style:paragraph-properties fo:margin-top="0.2083in" fo:margin-bottom="0in" style:contextual-spacing="false"/>
      <style:text-properties officeooo:paragraph-rsid="0004aeb3"/>
    </style:style>
    <style:style style:name="P12" style:family="paragraph" style:parent-style-name="Text_20_body">
      <style:paragraph-properties fo:margin-top="0.2083in" fo:margin-bottom="0in" style:contextual-spacing="false" fo:text-align="center" style:justify-single-word="false"/>
      <style:text-properties officeooo:paragraph-rsid="0004aeb3"/>
    </style:style>
    <style:style style:name="P13" style:family="paragraph" style:parent-style-name="Title">
      <style:paragraph-properties fo:margin-top="0.5in" fo:margin-bottom="0.5in" style:contextual-spacing="false"/>
      <style:text-properties officeooo:paragraph-rsid="0004aeb3"/>
    </style:style>
    <style:style style:name="P14" style:family="paragraph" style:parent-style-name="Standard">
      <style:text-properties officeooo:paragraph-rsid="0004aeb3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officeooo:paragraph-rsid="0004aeb3"/>
    </style:style>
    <style:style style:name="P16" style:family="paragraph" style:parent-style-name="Standard">
      <style:paragraph-properties fo:margin-top="0.278in" fo:margin-bottom="0in" style:contextual-spacing="false" fo:line-height="150%" fo:orphans="0" fo:widows="0"/>
      <style:text-properties officeooo:paragraph-rsid="0004aeb3"/>
    </style:style>
    <style:style style:name="P17" style:family="paragraph" style:parent-style-name="Standard">
      <style:paragraph-properties fo:margin-left="-0.0752in" fo:margin-top="0.0972in" fo:margin-bottom="0in" style:contextual-spacing="false" fo:orphans="0" fo:widows="0"/>
      <style:text-properties officeooo:paragraph-rsid="0004aeb3"/>
    </style:style>
    <style:style style:name="P18" style:family="paragraph" style:parent-style-name="Standard">
      <style:paragraph-properties fo:line-height="0.1252in" fo:text-align="center" style:justify-single-word="false" fo:orphans="0" fo:widows="0"/>
      <style:text-properties fo:font-size="10pt" officeooo:paragraph-rsid="0004aeb3" style:font-size-asian="10pt" style:font-size-complex="10pt"/>
    </style:style>
    <style:style style:name="P19" style:family="paragraph" style:parent-style-name="Standard">
      <style:paragraph-properties fo:line-height="0.1252in" fo:text-align="justify" style:justify-single-word="false" fo:orphans="0" fo:widows="0"/>
      <style:text-properties officeooo:paragraph-rsid="0004aeb3"/>
    </style:style>
    <style:style style:name="P20" style:family="paragraph" style:parent-style-name="Standard">
      <style:paragraph-properties fo:text-align="center" style:justify-single-word="false" fo:orphans="0" fo:widows="0"/>
      <style:text-properties officeooo:paragraph-rsid="0004aeb3"/>
    </style:style>
    <style:style style:name="P21" style:family="paragraph" style:parent-style-name="Compact" style:list-style-name="WWNum1001"/>
    <style:style style:name="P22" style:family="paragraph" style:parent-style-name="Compact" style:list-style-name="WWNum1002"/>
    <style:style style:name="P23" style:family="paragraph" style:parent-style-name="Compact" style:list-style-name="WWNum1003"/>
    <style:style style:name="P24" style:family="paragraph" style:parent-style-name="Heading_20_2">
      <style:text-properties officeooo:paragraph-rsid="00091d0b"/>
    </style:style>
    <style:style style:name="P25" style:family="paragraph" style:parent-style-name="Text_20_body">
      <style:text-properties officeooo:rsid="00091d0b" officeooo:paragraph-rsid="00091d0b"/>
    </style:style>
    <style:style style:name="P26" style:family="paragraph" style:parent-style-name="Text_20_body">
      <style:paragraph-properties fo:text-align="center" style:justify-single-word="false"/>
      <style:text-properties officeooo:rsid="00091d0b" officeooo:paragraph-rsid="00091d0b"/>
    </style:style>
    <style:style style:name="P27" style:family="paragraph" style:parent-style-name="Text_20_body">
      <style:paragraph-properties fo:text-align="center" style:justify-single-word="false"/>
      <style:text-properties officeooo:rsid="00091d0b" officeooo:paragraph-rsid="000b1c78"/>
    </style:style>
    <style:style style:name="P28" style:family="paragraph" style:parent-style-name="Heading_20_2">
      <style:text-properties officeooo:rsid="000735e2" officeooo:paragraph-rsid="00091d0b"/>
    </style:style>
    <style:style style:name="P29" style:family="paragraph" style:parent-style-name="Compact">
      <style:paragraph-properties fo:text-align="left" style:justify-single-word="false" fo:orphans="2" fo:widows="2"/>
      <style:text-properties style:font-name="Aptos" fo:font-size="12pt" fo:language="ru" fo:country="RU" style:letter-kerning="false" style:font-size-asian="12pt" style:language-asian="zh" style:country-asian="CN" style:font-size-complex="12pt" style:language-complex="ar" style:country-complex="SA"/>
    </style:style>
    <style:style style:name="P30" style:family="paragraph" style:parent-style-name="Compact" style:list-style-name="WWNum1004"/>
    <style:style style:name="T1" style:family="text">
      <style:text-properties style:rfc-language-tag-asian="x-none"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04aeb3"/>
    </style:style>
    <style:style style:name="T7" style:family="text">
      <style:text-properties fo:font-size="16pt" fo:font-weight="normal" style:font-size-asian="16pt" style:font-weight-asian="normal" style:font-size-complex="16pt"/>
    </style:style>
    <style:style style:name="T8" style:family="text">
      <style:text-properties fo:font-size="16pt" fo:font-weight="normal" officeooo:rsid="00063964" style:font-size-asian="16pt" style:font-weight-asian="normal" style:font-size-complex="16pt"/>
    </style:style>
    <style:style style:name="T9" style:family="text">
      <style:text-properties fo:font-size="11pt" officeooo:rsid="0004aeb3" style:font-size-asian="11pt" style:font-size-complex="11pt"/>
    </style:style>
    <style:style style:name="T10" style:family="text">
      <style:text-properties officeooo:rsid="000735e2"/>
    </style:style>
    <style:style style:name="T11" style:family="text">
      <style:text-properties officeooo:rsid="000b1c78"/>
    </style:style>
    <style:style style:name="T12" style:family="text">
      <style:text-properties officeooo:rsid="000be26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OLE_LINK1"/><text:span text:style-name="T1">МИНИСТЕРСТВО НАУКИ И ВЫСШЕГО ОБРАЗОВАНИЯ РОССИЙСКОЙ ФЕДЕРАЦИИ</text:span></text:p>
      <text:p text:style-name="P2">федеральное государственное автономное образовательное учреждение высшего образования</text:p>
      <text:p text:style-name="P1" loext:marker-style-name="T2"><text:span text:style-name="T3">«</text:span><text:span text:style-name="T2">САНКТ-ПЕТЕРБУРГСКИЙ ГОСУДАРСТВЕННЫЙ УНИВЕРСИТЕТ <text:line-break/>АЭРОКОСМИЧЕСКОГО ПРИБОРОСТРОЕНИЯ</text:span><text:bookmark-end text:name="OLE_LINK1"/><text:span text:style-name="T2">»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КАФЕДРА ВЫЧИСЛИТЕЛЬНЫХ СИСТЕМ И СЕТЕЙ</text:p>
            <text:p text:style-name="P4"/>
          </table:table-cell>
        </table:table-row>
      </table:table>
      <text:p text:style-name="P5"/>
      <text:p text:style-name="P5">ОЦЕНКА<text:tab/><text:tab/><text:tab/><text:tab/><text:tab/></text:p>
      <text:p text:style-name="P6">ПРЕПОДАВАТЕЛЬ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7">Старший преподаватель</text:p>
          </table:table-cell>
          <table:table-cell table:style-name="Table3.B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B1" office:value-type="string">
            <text:p text:style-name="P4"/>
          </table:table-cell>
          <table:table-cell table:style-name="Table3.A1" office:value-type="string">
            <text:p text:style-name="P7">Д.А.Булгаков</text:p>
          </table:table-cell>
        </table:table-row>
        <table:table-row table:style-name="Table3.1">
          <table:table-cell table:style-name="Table3.B1" office:value-type="string">
            <text:p text:style-name="P8" loext:marker-style-name="T4"><text:span text:style-name="T4">должность, уч. степень, звание</text:span></text:p>
          </table:table-cell>
          <table:table-cell table:style-name="Table3.B1" office:value-type="string">
            <text:p text:style-name="P9" loext:marker-style-name="T5"/>
          </table:table-cell>
          <table:table-cell table:style-name="Table3.B1" office:value-type="string">
            <text:p text:style-name="P8" loext:marker-style-name="T4"><text:span text:style-name="T4">подпись, дата</text:span></text:p>
          </table:table-cell>
          <table:table-cell table:style-name="Table3.B1" office:value-type="string">
            <text:p text:style-name="P9" loext:marker-style-name="T5"/>
          </table:table-cell>
          <table:table-cell table:style-name="Table3.B1" office:value-type="string">
            <text:p text:style-name="P8" loext:marker-style-name="T4"><text:span text:style-name="T4">инициалы, фамилия</text:span></text:p>
          </table:table-cell>
        </table:table-row>
      </table:table>
      <text:p text:style-name="P1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/>
            <text:p text:style-name="P12">ОТЧЕТ О ЛАБОРАТОРНОЙ РАБОТЕ №<text:span text:style-name="T6">2</text:span></text:p>
          </table:table-cell>
        </table:table-row>
        <table:table-row table:style-name="Table4.1">
          <table:table-cell table:style-name="Table4.A2" office:value-type="string">
            <text:p text:style-name="P13" loext:marker-style-name="T7"><text:span text:style-name="T7">Лабораторная работа: </text:span><text:span text:style-name="T8">работае с дисплеем</text:span></text:p>
            <text:p text:style-name="P14"/>
          </table:table-cell>
        </table:table-row>
        <table:table-row table:style-name="Table4.3">
          <table:table-cell table:style-name="Table4.A3" office:value-type="string">
            <text:p text:style-name="P15">по дисциплине: <text:span text:style-name="T6">Управление виртуальным двойником</text:span></text:p>
          </table:table-cell>
        </table:table-row>
      </table:table>
      <text:p text:style-name="P16">РАБОТУ ВЫПОЛНИЛ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7">СТУДЕНТ гр. №</text:p>
          </table:table-cell>
          <table:table-cell table:style-name="Table5.B1" office:value-type="string">
            <text:p text:style-name="P4">4241в</text:p>
          </table:table-cell>
          <table:table-cell table:style-name="Table5.A1" office:value-type="string">
            <text:p text:style-name="P4"/>
          </table:table-cell>
          <table:table-cell table:style-name="Table5.D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D1" office:value-type="string">
            <text:p text:style-name="P7">А.А.Хусаинов</text:p>
          </table:table-cell>
        </table:table-row>
        <table:table-row table:style-name="Table5.2">
          <table:table-cell table:style-name="Table5.A1" office:value-type="string">
            <text:p text:style-name="P18" loext:marker-style-name="T4"/>
          </table:table-cell>
          <table:table-cell table:style-name="Table5.B2" office:value-type="string">
            <text:p text:style-name="P8" loext:marker-style-name="T5"><text:span text:style-name="T4">номер группы</text:span></text:p>
          </table:table-cell>
          <table:table-cell table:style-name="Table5.A1" office:value-type="string">
            <text:p text:style-name="P9" loext:marker-style-name="T5"/>
          </table:table-cell>
          <table:table-cell table:style-name="Table5.D2" office:value-type="string">
            <text:p text:style-name="P8" loext:marker-style-name="T4"><text:span text:style-name="T4">подпись, дата</text:span></text:p>
          </table:table-cell>
          <table:table-cell table:style-name="Table5.A1" office:value-type="string">
            <text:p text:style-name="P9" loext:marker-style-name="T5"/>
          </table:table-cell>
          <table:table-cell table:style-name="Table5.A1" office:value-type="string">
            <text:p text:style-name="P8" loext:marker-style-name="T4"><text:span text:style-name="T4">инициалы, фамилия</text:span></text:p>
          </table:table-cell>
        </table:table-row>
        <table:table-row table:style-name="Table5.3">
          <table:table-cell table:style-name="Table5.A1" office:value-type="string">
            <text:p text:style-name="P19" loext:marker-style-name="T5"><text:span text:style-name="T4">Студенческий билет №</text:span></text:p>
          </table:table-cell>
          <table:table-cell table:style-name="Table5.D1" table:number-columns-spanned="2" office:value-type="string">
            <text:p text:style-name="P8" loext:marker-style-name="T5"><text:span text:style-name="T5">2022/27</text:span><text:span text:style-name="T9">8</text:span><text:span text:style-name="T5">3</text:span></text:p>
          </table:table-cell>
          <table:covered-table-cell/>
          <table:table-cell table:style-name="Table5.A1" office:value-type="string">
            <text:p text:style-name="P18" loext:marker-style-name="T4"/>
          </table:table-cell>
          <table:table-cell table:style-name="Table5.A1" office:value-type="string">
            <text:p text:style-name="P9" loext:marker-style-name="T5"/>
          </table:table-cell>
          <table:table-cell table:style-name="Table5.A1" office:value-type="string">
            <text:p text:style-name="P18" loext:marker-style-name="T4"/>
          </table:table-cell>
        </table:table-row>
      </table:table>
      <text:p text:style-name="P20">Санкт-Петербург 2026<text:bookmark-start text:name="X318b530629edd0049822c83109e64e5aaaa7d9c"/></text:p>
      <text:h text:style-name="Heading_20_2" text:outline-level="2"><text:bookmark-start text:name="цель-работы"/><text:soft-page-break/>Цель работы</text:h>
      <text:p text:style-name="First_20_Paragraph">Цель работы — реализовать управление OLED-дисплеем SSD1306 128×64 с Arduino из веб-интерфейса, организовать обмен данными через COM-порт с использованием Web Serial API и отобразить содержимое OLED не только на физическом дисплее, но и в интерфейсе цифрового двойника на Three.js.</text:p>
      <text:p text:style-name="Text_20_body">В ходе работы решались следующие задачи:</text:p>
      <text:list xml:id="list80447179" text:style-name="WWNum1001">
        <text:list-item>
          <text:p text:style-name="P21">настроить прошивку Arduino для приёма команд по Serial;</text:p>
        </text:list-item>
        <text:list-item>
          <text:p text:style-name="P21">реализовать команды для вывода текста, чтения текущего состояния, отображения углов и передачи bitmap;</text:p>
        </text:list-item>
        <text:list-item>
          <text:p text:style-name="P21">подключить веб-интерфейс к Arduino через Web Serial API;</text:p>
        </text:list-item>
        <text:list-item>
          <text:p text:style-name="P21">вывести состояние OLED в HTML canvas;</text:p>
        </text:list-item>
        <text:list-item>
          <text:p text:style-name="P21">сформировать texture для 3D-модели, чтобы экран в Three.js показывал те же данные, что и OLED.<text:bookmark-end text:name="цель-работы"/></text:p>
        </text:list-item>
      </text:list>
      <text:h text:style-name="Heading_20_2" text:outline-level="2"><text:bookmark-start text:name="X044c35138b777e29ef5bf1546b136e1f6571695"/>Используемое оборудование и программные средства</text:h>
      <text:p text:style-name="First_20_Paragraph">В проекте используется плата Arduino Nano на реальной установке. Для отладки также применялась тестовая Arduino Uno без подключенных сервоприводов и OLED-дисплея.</text:p>
      <text:p text:style-name="Text_20_body">Основные компоненты:</text:p>
      <text:list xml:id="list1351421357511" text:continue-list="list80447179" text:style-name="WWNum1002">
        <text:list-item>
          <text:p text:style-name="P22">Arduino Nano / Arduino Uno;</text:p>
        </text:list-item>
        <text:list-item>
          <text:p text:style-name="P22">OLED-дисплей SSD1306 128×64, I2C-адрес <text:span text:style-name="Verbatim_20_Char">0x3C</text:span>;</text:p>
        </text:list-item>
        <text:list-item>
          <text:p text:style-name="P22">веб-приложение на Vite + TypeScript;</text:p>
        </text:list-item>
        <text:list-item>
          <text:p text:style-name="P22">Web Serial API в браузере Chrome/Edge;</text:p>
        </text:list-item>
        <text:list-item>
          <text:p text:style-name="P22">Three.js для 3D-визуализации;</text:p>
        </text:list-item>
        <text:list-item>
          <text:p text:style-name="P22">Arduino-библиотеки <text:span text:style-name="Verbatim_20_Char">Servo</text:span>, <text:span text:style-name="Verbatim_20_Char">Wire</text:span>, <text:span text:style-name="Verbatim_20_Char">Adafruit_GFX</text:span>, <text:span text:style-name="Verbatim_20_Char">Adafruit_SSD1306</text:span>.<text:bookmark-end text:name="X044c35138b777e29ef5bf1546b136e1f6571695"/></text:p>
        </text:list-item>
      </text:list>
      <text:h text:style-name="Heading_20_2" text:outline-level="2"><text:bookmark-start text:name="общая-схема-работы"/>Общая схема работы</text:h>
      <text:p text:style-name="First_20_Paragraph">Система состоит из трёх основных частей:</text:p>
      <text:list text:style-name="WWNum1003">
        <text:list-item text:start-value="1">
          <text:p text:style-name="P23">Arduino-прошивка принимает команды по Serial, управляет OLED и возвращает ответы.</text:p>
        </text:list-item>
        <text:list-item>
          <text:p text:style-name="P23">Веб-интерфейс отправляет команды через Web Serial API и отображает TX/RX лог.</text:p>
        </text:list-item>
        <text:list-item>
          <text:p text:style-name="P23">Three.js-модуль рисует содержимое OLED в canvas и использует его как texture для mesh <text:span text:style-name="Verbatim_20_Char">OLED_SCREEN</text:span> на 3D-модели.</text:p>
        </text:list-item>
      </text:list>
      <text:p text:style-name="First_20_Paragraph">Логическая схема обмена:</text:p>
      <text:p text:style-name="Source_20_Code"><text:span text:style-name="Verbatim_20_Char">Пользователь</text:span><text:line-break/><text:span text:style-name="Verbatim_20_Char"> <text:s/>-&gt; Веб-интерфейс</text:span><text:line-break/><text:span text:style-name="Verbatim_20_Char"> <text:s/>-&gt; Web Serial API</text:span><text:line-break/><text:span text:style-name="Verbatim_20_Char"> <text:s/>-&gt; USB COM-порт</text:span><text:line-break/><text:span text:style-name="Verbatim_20_Char"> <text:s/>-&gt; Arduino</text:span><text:line-break/><text:span text:style-name="Verbatim_20_Char"> <text:s/>-&gt; OLED SSD1306</text:span><text:line-break/><text:soft-page-break/><text:line-break/><text:span text:style-name="Verbatim_20_Char">Arduino</text:span><text:line-break/><text:span text:style-name="Verbatim_20_Char"> <text:s/>-&gt; Serial-ответ</text:span><text:line-break/><text:span text:style-name="Verbatim_20_Char"> <text:s/>-&gt; Web Serial API</text:span><text:line-break/><text:span text:style-name="Verbatim_20_Char"> <text:s/>-&gt; OLED preview canvas</text:span><text:line-break/><text:span text:style-name="Verbatim_20_Char"> <text:s/>-&gt; Three.js CanvasTexture</text:span><text:bookmark-end text:name="общая-схема-работы"/></text:p>
      <text:h text:style-name="Heading_20_2" text:outline-level="2"><text:bookmark-start text:name="com-порт-и-web-serial-api"/>COM-порт и Web Serial API</text:h>
      <text:p text:style-name="First_20_Paragraph">COM-порт — это последовательный порт, через который компьютер обменивается байтами с внешним устройством. В Linux подключённая Arduino обычно отображается как устройство вида <text:span text:style-name="Verbatim_20_Char">/dev/ttyUSB0</text:span> или <text:span text:style-name="Verbatim_20_Char">/dev/ttyACM0</text:span>. В Windows это обычно <text:span text:style-name="Verbatim_20_Char">COM3</text:span>, <text:span text:style-name="Verbatim_20_Char">COM4</text:span> и т.п.</text:p>
      <text:p text:style-name="Text_20_body">Для Arduino последовательный порт является стандартным способом отладки и управления. В прошивке он открывается строкой:</text:p>
      <text:p text:style-name="Source_20_Code"><text:span text:style-name="NormalTok">Serial</text:span><text:span text:style-name="OperatorTok">.</text:span><text:span text:style-name="NormalTok">begin</text:span><text:span text:style-name="OperatorTok">(</text:span><text:span text:style-name="DecValTok">9600</text:span><text:span text:style-name="OperatorTok">);</text:span></text:p>
      <text:p text:style-name="First_20_Paragraph">Скорость <text:span text:style-name="Verbatim_20_Char">9600 baud</text:span> означает, что обе стороны должны работать на одной скорости. Если браузер откроет порт на другой скорости, текстовые команды и ответы будут читаться неправильно.</text:p>
      <text:p text:style-name="Text_20_body">Обычная веб-страница не имеет прямого доступа к COM-портам из соображений безопасности. Поэтому используется Web Serial API. Этот API доступен в Chromium-браузерах, например Chrome и Edge. Пользователь обязательно должен вручную выбрать устройство в диалоге браузера.</text:p>
      <text:p text:style-name="Text_20_body">Фрагмент подключения в <text:span text:style-name="Verbatim_20_Char">src/serial.ts</text:span>:</text:p>
      <text:p text:style-name="Source_20_Code"><text:span text:style-name="ImportTok">export</text:span><text:span text:style-name="NormalTok"> </text:span><text:span text:style-name="KeywordTok">async</text:span><text:span text:style-name="NormalTok"> </text:span><text:span text:style-name="KeywordTok">function</text:span><text:span text:style-name="NormalTok"> </text:span><text:span text:style-name="FunctionTok">connect</text:span><text:span text:style-name="NormalTok">(baudRate</text:span><text:span text:style-name="OperatorTok">:</text:span><text:span text:style-name="NormalTok"> </text:span><text:span text:style-name="DataTypeTok">number</text:span><text:span text:style-name="NormalTok">)</text:span><text:span text:style-name="OperatorTok">:</text:span><text:span text:style-name="NormalTok"> </text:span><text:span text:style-name="BuiltInTok">Promise</text:span><text:span text:style-name="OperatorTok">&lt;</text:span><text:span text:style-name="DataTypeTok">void</text:span><text:span text:style-name="OperatorTok">&gt;</text:span><text:span text:style-name="NormalTok"> {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FunctionTok">isSupported</text:span><text:span text:style-name="NormalTok">()) {</text:span><text:line-break/><text:span text:style-name="NormalTok"> <text:s text:c="3"/></text:span><text:span text:style-name="ControlFlowTok">throw</text:span><text:span text:style-name="NormalTok"> </text:span><text:span text:style-name="KeywordTok">new</text:span><text:span text:style-name="NormalTok"> </text:span><text:span text:style-name="BuiltInTok">Error</text:span><text:span text:style-name="NormalTok">(</text:span><text:span text:style-name="StringTok">'Web Serial API не поддерживается в этом браузере'</text:span><text:span text:style-name="NormalTok">)</text:span><text:line-break/><text:span text:style-name="NormalTok"> <text:s/>}</text:span><text:line-break/><text:line-break/><text:span text:style-name="NormalTok"> <text:s/>port </text:span><text:span text:style-name="OperatorTok">=</text:span><text:span text:style-name="NormalTok"> </text:span><text:span text:style-name="ControlFlowTok">await</text:span><text:span text:style-name="NormalTok"> </text:span><text:span text:style-name="BuiltInTok">navigator</text:span><text:span text:style-name="OperatorTok">.</text:span><text:span text:style-name="AttributeTok">serial</text:span><text:span text:style-name="OperatorTok">.</text:span><text:span text:style-name="FunctionTok">requestPort</text:span><text:span text:style-name="NormalTok">()</text:span><text:line-break/><text:span text:style-name="NormalTok"> <text:s/></text:span><text:span text:style-name="ControlFlowTok">await</text:span><text:span text:style-name="NormalTok"> port</text:span><text:span text:style-name="OperatorTok">.</text:span><text:span text:style-name="FunctionTok">open</text:span><text:span text:style-name="NormalTok">({ baudRate })</text:span><text:line-break/><text:line-break/><text:span text:style-name="NormalTok"> <text:s/>reader </text:span><text:span text:style-name="OperatorTok">=</text:span><text:span text:style-name="NormalTok"> port</text:span><text:span text:style-name="OperatorTok">.</text:span><text:span text:style-name="AttributeTok">readable</text:span><text:span text:style-name="OperatorTok">!.</text:span><text:span text:style-name="FunctionTok">getReader</text:span><text:span text:style-name="NormalTok">()</text:span><text:line-break/><text:span text:style-name="NormalTok"> <text:s/>writer </text:span><text:span text:style-name="OperatorTok">=</text:span><text:span text:style-name="NormalTok"> port</text:span><text:span text:style-name="OperatorTok">.</text:span><text:span text:style-name="AttributeTok">writable</text:span><text:span text:style-name="OperatorTok">!.</text:span><text:span text:style-name="FunctionTok">getWriter</text:span><text:span text:style-name="NormalTok">()</text:span><text:line-break/><text:line-break/><text:span text:style-name="NormalTok"> <text:s/>readLoopActive </text:span><text:span text:style-name="OperatorTok">=</text:span><text:span text:style-name="NormalTok"> </text:span><text:span text:style-name="KeywordTok">true</text:span><text:line-break/><text:span text:style-name="NormalTok"> <text:s/></text:span><text:span text:style-name="FunctionTok">readLoop</text:span><text:span text:style-name="NormalTok">()</text:span><text:line-break/><text:span text:style-name="NormalTok">}</text:span></text:p>
      <text:p text:style-name="First_20_Paragraph">Здесь <text:span text:style-name="Verbatim_20_Char">navigator.serial.requestPort()</text:span> открывает системный диалог выбора порта. После выбора вызывается <text:span text:style-name="Verbatim_20_Char">port.open({ baudRate })</text:span>, затем приложение получает <text:span text:style-name="Verbatim_20_Char">reader</text:span> для чтения входящих байтов и <text:span text:style-name="Verbatim_20_Char">writer</text:span> для отправки команд.</text:p>
      <text:p text:style-name="Text_20_body">Отправка данных выполняется через <text:span text:style-name="Verbatim_20_Char">TextEncoder</text:span>:</text:p>
      <text:p text:style-name="Source_20_Code"><text:soft-page-break/><text:span text:style-name="ImportTok">export</text:span><text:span text:style-name="NormalTok"> </text:span><text:span text:style-name="KeywordTok">async</text:span><text:span text:style-name="NormalTok"> </text:span><text:span text:style-name="KeywordTok">function</text:span><text:span text:style-name="NormalTok"> </text:span><text:span text:style-name="FunctionTok">send</text:span><text:span text:style-name="NormalTok">(data</text:span><text:span text:style-name="OperatorTok">:</text:span><text:span text:style-name="NormalTok"> </text:span><text:span text:style-name="DataTypeTok">string</text:span><text:span text:style-name="NormalTok">)</text:span><text:span text:style-name="OperatorTok">:</text:span><text:span text:style-name="NormalTok"> </text:span><text:span text:style-name="BuiltInTok">Promise</text:span><text:span text:style-name="OperatorTok">&lt;</text:span><text:span text:style-name="DataTypeTok">void</text:span><text:span text:style-name="OperatorTok">&gt;</text:span><text:span text:style-name="NormalTok"> {</text:span><text:line-break/><text:span text:style-name="NormalTok"> </text:span><text:span text:style-name="ControlFlowTok">if</text:span><text:span text:style-name="NormalTok"> (</text:span><text:span text:style-name="OperatorTok">!</text:span><text:span text:style-name="NormalTok">writer) {</text:span><text:line-break/><text:span text:style-name="NormalTok"> </text:span><text:span text:style-name="ControlFlowTok">throw</text:span><text:span text:style-name="NormalTok"> </text:span><text:span text:style-name="KeywordTok">new</text:span><text:span text:style-name="NormalTok"> </text:span><text:span text:style-name="BuiltInTok">Error</text:span><text:span text:style-name="NormalTok">(</text:span><text:span text:style-name="StringTok">'Не подключено'</text:span><text:span text:style-name="NormalTok">)</text:span><text:line-break/><text:span text:style-name="NormalTok"> }</text:span><text:line-break/><text:line-break/><text:span text:style-name="NormalTok"> </text:span><text:span text:style-name="ControlFlowTok">await</text:span><text:span text:style-name="NormalTok"> writer</text:span><text:span text:style-name="OperatorTok">.</text:span><text:span text:style-name="FunctionTok">write</text:span><text:span text:style-name="NormalTok">(textEncoder</text:span><text:span text:style-name="OperatorTok">.</text:span><text:span text:style-name="FunctionTok">encode</text:span><text:span text:style-name="NormalTok">(data))</text:span><text:line-break/><text:span text:style-name="NormalTok">}</text:span><text:bookmark-end text:name="com-порт-и-web-serial-api"/></text:p>
      <text:h text:style-name="P24" text:outline-level="2">Про<text:span text:style-name="T10">верка на реальном стенде</text:span></text:h>
      <text:p text:style-name="P25">Проверим получение и отправку текста из интерфейса для отображения на oled экране.</text:p>
      <text:p text:style-name="P26"><draw:frame draw:style-name="fr1" draw:name="Image2" text:anchor-type="char" svg:x="0.6665in" svg:y="0.061in" svg:width="5.3854in" svg:height="4.0398in" draw:z-index="0"><draw:image xlink:href="Pictures/1000000000000A0000000780FFA4E6F3.jpg" xlink:type="simple" xlink:show="embed" xlink:actuate="onLoad" draw:mime-type="image/jpeg"/></draw:frame>Рис. 1 — интерфейс с тестовой отправкой</text:p>
      <text:p text:style-name="P26"><draw:frame draw:style-name="fr2" draw:name="Image3" text:anchor-type="char" svg:width="6.5in" svg:height="4.8752in" draw:z-index="1" draw:transform="translate (-3.25in -2.43759842519685in) rotate (4.71238898038469) translate (3.25in 2.43759842519685in)"><draw:image xlink:href="Pictures/1000000000000A00000007802963BDE2.jpg" xlink:type="simple" xlink:show="embed" xlink:actuate="onLoad" draw:mime-type="image/jpeg"/></draw:frame><text:soft-page-break/>Рис. 2 — oled экран с тестовой отправкой</text:p>
      <text:p text:style-name="P26"><draw:frame draw:style-name="fr3" draw:name="Image1" text:anchor-type="char" svg:width="5.5173in" svg:height="4.1382in" draw:z-index="2" draw:transform="translate (-2.75866141732283in -2.06909448818898in) rotate (4.71238898038469) translate (2.75866141732283in 2.06909448818898in)"><draw:image xlink:href="Pictures/1000000000000A000000078097A098E7.jpg" xlink:type="simple" xlink:show="embed" xlink:actuate="onLoad" draw:mime-type="image/jpeg"/></draw:frame><text:soft-page-break/>Рис. 3 — oled экран с bitmap изображением</text:p>
      <text:p text:style-name="P26"><draw:frame draw:style-name="fr3" draw:name="Image4" text:anchor-type="char" svg:width="4.9689in" svg:height="3.9016in" draw:z-index="3"><draw:image xlink:href="Pictures/1000000000000A0000000780CBA5E0FB.jpg" xlink:type="simple" xlink:show="embed" xlink:actuate="onLoad" draw:mime-type="image/jpeg"/></draw:frame><text:soft-page-break/>Рис. 4 — интерфейс с <text:span text:style-name="T11">отображением bitmap</text:span></text:p>
      <text:p text:style-name="P26"/>
      <text:p text:style-name="P27"><draw:frame draw:style-name="fr4" draw:name="Image5" text:anchor-type="char" svg:width="5.1354in" svg:height="3.8516in" draw:z-index="4"><draw:image xlink:href="Pictures/1000000000000A0000000780400075E5.jpg" xlink:type="simple" xlink:show="embed" xlink:actuate="onLoad" draw:mime-type="image/jpeg"/></draw:frame>Рис. <text:span text:style-name="T11">5</text:span> — ин<text:span text:style-name="T11">терфейс с углами</text:span></text:p>
      <text:p text:style-name="P27"><draw:frame draw:style-name="fr5" draw:name="Image6" text:anchor-type="char" svg:width="6.5in" svg:height="8.6665in" draw:z-index="5"><draw:image xlink:href="Pictures/100000000000078000000A0042277F1E.jpg" xlink:type="simple" xlink:show="embed" xlink:actuate="onLoad" draw:mime-type="image/jpeg"/></draw:frame><text:soft-page-break/>Рис. <text:span text:style-name="T12">6</text:span> — <text:span text:style-name="T12">oled экран</text:span><text:span text:style-name="T11"> с углами</text:span></text:p>
      <text:h text:style-name="P28" text:outline-level="2"><text:soft-page-break/><text:line-break/></text:h>
      <text:h text:style-name="Heading_20_2" text:outline-level="2"><text:bookmark-start text:name="протокол-oled-команд"/>Протокол OLED-команд</text:h>
      <text:p text:style-name="First_20_Paragraph">Команды в проекте имеют текстовый формат и завершаются символом <text:span text:style-name="Verbatim_20_Char">;</text:span>. Arduino читает входящий поток до <text:span text:style-name="Verbatim_20_Char">;</text:span>, после чего разбирает команду.</text:p>
      <text:p text:style-name="Text_20_body">Поддерживаемые команды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9">Команда</text:p>
            </table:table-cell>
            <table:table-cell table:style-name="Table1.A1" office:value-type="string">
              <text:p text:style-name="P29">Назначение</text:p>
            </table:table-cell>
            <table:table-cell table:style-name="Table1.A1" office:value-type="string">
              <text:p text:style-name="P29">Пример ответа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9"><text:span text:style-name="Verbatim_20_Char">OLED_TEXT:&lt;text&gt;;</text:span></text:p>
          </table:table-cell>
          <table:table-cell table:style-name="Table1.B2" office:value-type="string">
            <text:p text:style-name="P29">Показать текст на OLED</text:p>
          </table:table-cell>
          <table:table-cell table:style-name="Table1.C2" office:value-type="string">
            <text:p text:style-name="P29"><text:span text:style-name="Verbatim_20_Char">%Interface OLED test%;</text:span></text:p>
          </table:table-cell>
        </table:table-row>
        <table:table-row table:style-name="Table1.1">
          <table:table-cell table:style-name="Table1.A3" office:value-type="string">
            <text:p text:style-name="P29"><text:span text:style-name="Verbatim_20_Char">OLED_READ?;</text:span></text:p>
          </table:table-cell>
          <table:table-cell table:style-name="Table1.B3" office:value-type="string">
            <text:p text:style-name="P29">Прочитать текущий OLED-текст</text:p>
          </table:table-cell>
          <table:table-cell table:style-name="Table1.C3" office:value-type="string">
            <text:p text:style-name="P29"><text:span text:style-name="Verbatim_20_Char">%Khusainov AA 4241v%;</text:span></text:p>
          </table:table-cell>
        </table:table-row>
        <table:table-row table:style-name="Table1.1">
          <table:table-cell table:style-name="Table1.A4" office:value-type="string">
            <text:p text:style-name="P29"><text:span text:style-name="Verbatim_20_Char">OLED_ANGLES?;</text:span></text:p>
          </table:table-cell>
          <table:table-cell table:style-name="Table1.B4" office:value-type="string">
            <text:p text:style-name="P29">Включить режим отображения углов сервоприводов</text:p>
          </table:table-cell>
          <table:table-cell table:style-name="Table1.C4" office:value-type="string">
            <text:p text:style-name="P29"><text:span text:style-name="Verbatim_20_Char">%A90 B90 C90 D90 E90%;</text:span></text:p>
          </table:table-cell>
        </table:table-row>
        <table:table-row table:style-name="Table1.1">
          <table:table-cell table:style-name="Table1.A5" office:value-type="string">
            <text:p text:style-name="P29"><text:span text:style-name="Verbatim_20_Char">OLED_BITMAP?;</text:span></text:p>
          </table:table-cell>
          <table:table-cell table:style-name="Table1.B5" office:value-type="string">
            <text:p text:style-name="P29">Показать bitmap и передать его в веб-интерфейс</text:p>
          </table:table-cell>
          <table:table-cell table:style-name="Table1.C5" office:value-type="string">
            <text:p text:style-name="P29"><text:span text:style-name="Verbatim_20_Char">#OLED_BITMAP:1024</text:span> + 1024 байта</text:p>
          </table:table-cell>
        </table:table-row>
      </table:table>
      <text:p text:style-name="Text_20_body">Текстовый ответ Arduino помещается между символами <text:span text:style-name="Verbatim_20_Char">%</text:span>. Это упрощает извлечение OLED-текста на стороне веб-интерфейса:</text:p>
      <text:p text:style-name="Source_20_Code"><text:span text:style-name="KeywordTok">function</text:span><text:span text:style-name="NormalTok"> </text:span><text:span text:style-name="FunctionTok">extractOledText</text:span><text:span text:style-name="NormalTok">(input</text:span><text:span text:style-name="OperatorTok">:</text:span><text:span text:style-name="NormalTok"> </text:span><text:span text:style-name="DataTypeTok">string</text:span><text:span text:style-name="NormalTok">)</text:span><text:span text:style-name="OperatorTok">:</text:span><text:span text:style-name="NormalTok"> </text:span><text:span text:style-name="DataTypeTok">string</text:span><text:span text:style-name="NormalTok"> </text:span><text:span text:style-name="OperatorTok">|</text:span><text:span text:style-name="NormalTok"> </text:span><text:span text:style-name="DataTypeTok">null</text:span><text:span text:style-name="NormalTok"> {</text:span><text:line-break/><text:span text:style-name="NormalTok"> <text:s/></text:span><text:span text:style-name="KeywordTok">const</text:span><text:span text:style-name="NormalTok"> firstIndex </text:span><text:span text:style-name="OperatorTok">=</text:span><text:span text:style-name="NormalTok"> input</text:span><text:span text:style-name="OperatorTok">.</text:span><text:span text:style-name="FunctionTok">indexOf</text:span><text:span text:style-name="NormalTok">(</text:span><text:span text:style-name="StringTok">'%'</text:span><text:span text:style-name="NormalTok">)</text:span><text:line-break/><text:span text:style-name="NormalTok"> <text:s/></text:span><text:span text:style-name="ControlFlowTok">if</text:span><text:span text:style-name="NormalTok"> (firstIndex </text:span><text:span text:style-name="OperatorTok">===</text:span><text:span text:style-name="NormalTok"> </text:span><text:span text:style-name="OperatorTok">-</text:span><text:span text:style-name="DecValTok">1</text:span><text:span text:style-name="NormalTok">) </text:span><text:span text:style-name="ControlFlowTok">return</text:span><text:span text:style-name="NormalTok"> </text:span><text:span text:style-name="KeywordTok">null</text:span><text:line-break/><text:line-break/><text:span text:style-name="NormalTok"> <text:s/></text:span><text:span text:style-name="KeywordTok">const</text:span><text:span text:style-name="NormalTok"> secondIndex </text:span><text:span text:style-name="OperatorTok">=</text:span><text:span text:style-name="NormalTok"> input</text:span><text:span text:style-name="OperatorTok">.</text:span><text:span text:style-name="FunctionTok">indexOf</text:span><text:span text:style-name="NormalTok">(</text:span><text:span text:style-name="StringTok">'%'</text:span><text:span text:style-name="OperatorTok">,</text:span><text:span text:style-name="NormalTok"> firstIndex </text:span><text:span text:style-name="OperatorTok">+</text:span><text:span text:style-name="NormalTok"> </text:span><text:span text:style-name="DecValTok">1</text:span><text:span text:style-name="NormalTok">)</text:span><text:line-break/><text:span text:style-name="NormalTok"> <text:s/></text:span><text:span text:style-name="ControlFlowTok">if</text:span><text:span text:style-name="NormalTok"> (secondIndex </text:span><text:span text:style-name="OperatorTok">===</text:span><text:span text:style-name="NormalTok"> </text:span><text:span text:style-name="OperatorTok">-</text:span><text:span text:style-name="DecValTok">1</text:span><text:span text:style-name="NormalTok">) </text:span><text:span text:style-name="ControlFlowTok">return</text:span><text:span text:style-name="NormalTok"> </text:span><text:span text:style-name="KeywordTok">null</text:span><text:line-break/><text:line-break/><text:span text:style-name="NormalTok"> <text:s/></text:span><text:span text:style-name="ControlFlowTok">return</text:span><text:span text:style-name="NormalTok"> input</text:span><text:span text:style-name="OperatorTok">.</text:span><text:span text:style-name="FunctionTok">slice</text:span><text:span text:style-name="NormalTok">(firstIndex </text:span><text:span text:style-name="OperatorTok">+</text:span><text:span text:style-name="NormalTok"> </text:span><text:span text:style-name="DecValTok">1</text:span><text:span text:style-name="OperatorTok">,</text:span><text:span text:style-name="NormalTok"> secondIndex)</text:span><text:line-break/><text:span text:style-name="NormalTok">}</text:span><text:bookmark-end text:name="протокол-oled-команд"/></text:p>
      <text:h text:style-name="Heading_20_2" text:outline-level="2"><text:bookmark-start text:name="реализация-на-arduino"/>Реализация на Arduino</text:h>
      <text:p text:style-name="First_20_Paragraph">В прошивке используется фиксированный буфер команд. Это безопаснее для Arduino Nano/Uno, чем частое использование <text:span text:style-name="Verbatim_20_Char">String</text:span>, потому что у AVR-плат всего 2 KB SRAM, и динамические строки могут фрагментировать память.</text:p>
      <text:p text:style-name="Text_20_body">Основные настройки прошивки:</text:p>
      <text:p text:style-name="Source_20_Code"><text:span text:style-name="PreprocessorTok">#define SCREEN_WIDTH </text:span><text:span text:style-name="DecValTok">128</text:span><text:line-break/><text:span text:style-name="PreprocessorTok">#define SCREEN_HEIGHT </text:span><text:span text:style-name="DecValTok">64</text:span><text:line-break/><text:span text:style-name="PreprocessorTok">#define OLED_RESET </text:span><text:span text:style-name="OperatorTok">-</text:span><text:span text:style-name="DecValTok">1</text:span><text:line-break/><text:span text:style-name="PreprocessorTok">#define OLED_ADDRESS </text:span><text:span text:style-name="BaseNTok">0x3C</text:span><text:line-break/><text:span text:style-name="PreprocessorTok">#define OLED_REQUIRED </text:span><text:span text:style-name="KeywordTok">false</text:span><text:line-break/><text:span text:style-name="PreprocessorTok">#define SERIAL_BAUD </text:span><text:span text:style-name="DecValTok">9600</text:span><text:line-break/><text:soft-page-break/><text:span text:style-name="PreprocessorTok">#define COMMAND_BUFFER_SIZE </text:span><text:span text:style-name="DecValTok">97</text:span><text:line-break/><text:span text:style-name="PreprocessorTok">#define OLED_TEXT_BUFFER_SIZE </text:span><text:span text:style-name="DecValTok">81</text:span></text:p>
      <text:p text:style-name="First_20_Paragraph">Если OLED отсутствует, программа продолжает работать:</text:p>
      <text:p text:style-name="Source_20_Code"><text:span text:style-name="NormalTok">displayAvailable </text:span><text:span text:style-name="OperatorTok">=</text:span><text:span text:style-name="NormalTok"> display</text:span><text:span text:style-name="OperatorTok">.</text:span><text:span text:style-name="NormalTok">begin</text:span><text:span text:style-name="OperatorTok">(</text:span><text:span text:style-name="NormalTok">SSD1306_SWITCHCAPVCC</text:span><text:span text:style-name="OperatorTok">,</text:span><text:span text:style-name="NormalTok"> OLED_ADDRESS</text:span><text:span text:style-name="OperatorTok">);</text:span><text:line-break/><text:line-break/><text:span text:style-name="ControlFlowTok">if</text:span><text:span text:style-name="NormalTok"> </text:span><text:span text:style-name="OperatorTok">(!</text:span><text:span text:style-name="NormalTok">displayAvailable</text:span><text:span text:style-name="OperatorTok">)</text:span><text:span text:style-name="NormalTok"> </text:span><text:span text:style-name="OperatorTok">{</text:span><text:line-break/><text:span text:style-name="NormalTok"> <text:s/>Serial</text:span><text:span text:style-name="OperatorTok">.</text:span><text:span text:style-name="NormalTok">println</text:span><text:span text:style-name="OperatorTok">(</text:span><text:span text:style-name="StringTok">"WARN SSD1306 not found, mock mode"</text:span><text:span text:style-name="OperatorTok">);</text:span><text:line-break/><text:span text:style-name="NormalTok"> <text:s/></text:span><text:span text:style-name="ControlFlowTok">if</text:span><text:span text:style-name="NormalTok"> </text:span><text:span text:style-name="OperatorTok">(</text:span><text:span text:style-name="NormalTok">OLED_REQUIRED</text:span><text:span text:style-name="OperatorTok">)</text:span><text:span text:style-name="NormalTok"> </text:span><text:span text:style-name="OperatorTok">{</text:span><text:line-break/><text:span text:style-name="NormalTok"> <text:s text:c="3"/>Serial</text:span><text:span text:style-name="OperatorTok">.</text:span><text:span text:style-name="NormalTok">println</text:span><text:span text:style-name="OperatorTok">(</text:span><text:span text:style-name="StringTok">"ERR SSD1306 init failed"</text:span><text:span text:style-name="OperatorTok">);</text:span><text:line-break/><text:span text:style-name="NormalTok"> <text:s text:c="3"/></text:span><text:span text:style-name="ControlFlowTok">while</text:span><text:span text:style-name="NormalTok"> </text:span><text:span text:style-name="OperatorTok">(</text:span><text:span text:style-name="KeywordTok">true</text:span><text:span text:style-name="OperatorTok">)</text:span><text:span text:style-name="NormalTok"> </text:span><text:span text:style-name="OperatorTok">{</text:span><text:line-break/><text:span text:style-name="NormalTok"> <text:s text:c="5"/>delay</text:span><text:span text:style-name="OperatorTok">(</text:span><text:span text:style-name="DecValTok">1000</text:span><text:span text:style-name="OperatorTok">);</text:span><text:line-break/><text:span text:style-name="NormalTok"> <text:s text:c="3"/></text:span><text:span text:style-name="OperatorTok">}</text:span><text:line-break/><text:span text:style-name="NormalTok"> <text:s/></text:span><text:span text:style-name="OperatorTok">}</text:span><text:line-break/><text:span text:style-name="OperatorTok">}</text:span></text:p>
      <text:p text:style-name="First_20_Paragraph">Вывод текста на OLED:</text:p>
      <text:p text:style-name="Source_20_Code"><text:span text:style-name="DataTypeTok">void</text:span><text:span text:style-name="NormalTok"> showText</text:span><text:span text:style-name="OperatorTok">(</text:span><text:span text:style-name="AttributeTok">const</text:span><text:span text:style-name="NormalTok"> </text:span><text:span text:style-name="DataTypeTok">char</text:span><text:span text:style-name="NormalTok"> </text:span><text:span text:style-name="OperatorTok">*</text:span><text:span text:style-name="NormalTok">text</text:span><text:span text:style-name="OperatorTok">)</text:span><text:span text:style-name="NormalTok"> </text:span><text:span text:style-name="OperatorTok">{</text:span><text:line-break/><text:span text:style-name="NormalTok"> <text:s/></text:span><text:span text:style-name="ControlFlowTok">if</text:span><text:span text:style-name="NormalTok"> </text:span><text:span text:style-name="OperatorTok">(!</text:span><text:span text:style-name="NormalTok">displayAvailable</text:span><text:span text:style-name="OperatorTok">)</text:span><text:span text:style-name="NormalTok"> </text:span><text:span text:style-name="ControlFlowTok">return</text:span><text:span text:style-name="OperatorTok">;</text:span><text:line-break/><text:line-break/><text:span text:style-name="NormalTok"> <text:s/>display</text:span><text:span text:style-name="OperatorTok">.</text:span><text:span text:style-name="NormalTok">clearDisplay</text:span><text:span text:style-name="OperatorTok">();</text:span><text:line-break/><text:span text:style-name="NormalTok"> <text:s/>display</text:span><text:span text:style-name="OperatorTok">.</text:span><text:span text:style-name="NormalTok">setTextColor</text:span><text:span text:style-name="OperatorTok">(</text:span><text:span text:style-name="NormalTok">SSD1306_WHITE</text:span><text:span text:style-name="OperatorTok">);</text:span><text:line-break/><text:span text:style-name="NormalTok"> <text:s/>display</text:span><text:span text:style-name="OperatorTok">.</text:span><text:span text:style-name="NormalTok">setTextSize</text:span><text:span text:style-name="OperatorTok">(</text:span><text:span text:style-name="DecValTok">1</text:span><text:span text:style-name="OperatorTok">);</text:span><text:line-break/><text:span text:style-name="NormalTok"> <text:s/>display</text:span><text:span text:style-name="OperatorTok">.</text:span><text:span text:style-name="NormalTok">setCursor</text:span><text:span text:style-name="OperatorTok">(</text:span><text:span text:style-name="DecValTok">0</text:span><text:span text:style-name="OperatorTok">,</text:span><text:span text:style-name="NormalTok"> </text:span><text:span text:style-name="DecValTok">0</text:span><text:span text:style-name="OperatorTok">);</text:span><text:line-break/><text:span text:style-name="NormalTok"> <text:s/>display</text:span><text:span text:style-name="OperatorTok">.</text:span><text:span text:style-name="NormalTok">print</text:span><text:span text:style-name="OperatorTok">(</text:span><text:span text:style-name="NormalTok">text</text:span><text:span text:style-name="OperatorTok">);</text:span><text:line-break/><text:span text:style-name="NormalTok"> <text:s/>display</text:span><text:span text:style-name="OperatorTok">.</text:span><text:span text:style-name="NormalTok">display</text:span><text:span text:style-name="OperatorTok">();</text:span><text:line-break/><text:span text:style-name="OperatorTok">}</text:span></text:p>
      <text:p text:style-name="First_20_Paragraph">Отправка текущего текста обратно в веб-интерфейс:</text:p>
      <text:p text:style-name="Source_20_Code"><text:span text:style-name="DataTypeTok">void</text:span><text:span text:style-name="NormalTok"> sendCurrentText</text:span><text:span text:style-name="OperatorTok">()</text:span><text:span text:style-name="NormalTok"> </text:span><text:span text:style-name="OperatorTok">{</text:span><text:line-break/><text:span text:style-name="NormalTok"> <text:s/>Serial</text:span><text:span text:style-name="OperatorTok">.</text:span><text:span text:style-name="NormalTok">print</text:span><text:span text:style-name="OperatorTok">(</text:span><text:span text:style-name="CharTok">'%'</text:span><text:span text:style-name="OperatorTok">);</text:span><text:line-break/><text:span text:style-name="NormalTok"> <text:s/>Serial</text:span><text:span text:style-name="OperatorTok">.</text:span><text:span text:style-name="NormalTok">print</text:span><text:span text:style-name="OperatorTok">(</text:span><text:span text:style-name="NormalTok">currentText</text:span><text:span text:style-name="OperatorTok">);</text:span><text:line-break/><text:span text:style-name="NormalTok"> <text:s/>Serial</text:span><text:span text:style-name="OperatorTok">.</text:span><text:span text:style-name="NormalTok">println</text:span><text:span text:style-name="OperatorTok">(</text:span><text:span text:style-name="StringTok">"%;"</text:span><text:span text:style-name="OperatorTok">);</text:span><text:line-break/><text:span text:style-name="OperatorTok">}</text:span></text:p>
      <text:p text:style-name="First_20_Paragraph">Обработка OLED-команд:</text:p>
      <text:p text:style-name="Source_20_Code"><text:span text:style-name="ControlFlowTok">if</text:span><text:span text:style-name="NormalTok"> </text:span><text:span text:style-name="OperatorTok">(</text:span><text:span text:style-name="NormalTok">strncmp</text:span><text:span text:style-name="OperatorTok">(</text:span><text:span text:style-name="NormalTok">command</text:span><text:span text:style-name="OperatorTok">,</text:span><text:span text:style-name="NormalTok"> </text:span><text:span text:style-name="StringTok">"OLED_TEXT:"</text:span><text:span text:style-name="OperatorTok">,</text:span><text:span text:style-name="NormalTok"> </text:span><text:span text:style-name="DecValTok">10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<text:line-break/><text:span text:style-name="NormalTok"> <text:s/>oledMode </text:span><text:span text:style-name="OperatorTok">=</text:span><text:span text:style-name="NormalTok"> OLED_MODE_TEXT</text:span><text:span text:style-name="OperatorTok">;</text:span><text:line-break/><text:span text:style-name="NormalTok"> <text:s/>strncpy</text:span><text:span text:style-name="OperatorTok">(</text:span><text:span text:style-name="NormalTok">currentText</text:span><text:span text:style-name="OperatorTok">,</text:span><text:span text:style-name="NormalTok"> command </text:span><text:span text:style-name="OperatorTok">+</text:span><text:span text:style-name="NormalTok"> </text:span><text:span text:style-name="DecValTok">10</text:span><text:span text:style-name="OperatorTok">,</text:span><text:span text:style-name="NormalTok"> </text:span><text:span text:style-name="KeywordTok">sizeof</text:span><text:span text:style-name="OperatorTok">(</text:span><text:span text:style-name="NormalTok">currentText</text:span><text:span text:style-name="OperatorTok">)</text:span><text:span text:style-name="NormalTok"> </text:span><text:span text:style-name="OperatorTok">-</text:span><text:span text:style-name="NormalTok"> </text:span><text:span text:style-name="DecValTok">1</text:span><text:span text:style-name="OperatorTok">);</text:span><text:line-break/><text:span text:style-name="NormalTok"> <text:s/>currentText</text:span><text:span text:style-name="OperatorTok">[</text:span><text:span text:style-name="KeywordTok">sizeof</text:span><text:span text:style-name="OperatorTok">(</text:span><text:span text:style-name="NormalTok">currentText</text:span><text:span text:style-name="OperatorTok">)</text:span><text:span text:style-name="NormalTok"> </text:span><text:span text:style-name="OperatorTok">-</text:span><text:span text:style-name="NormalTok"> </text:span><text:span text:style-name="DecValTok">1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<text:line-break/><text:span text:style-name="NormalTok"> <text:s/>trimCommand</text:span><text:span text:style-name="OperatorTok">(</text:span><text:span text:style-name="NormalTok">currentText</text:span><text:span text:style-name="OperatorTok">);</text:span><text:line-break/><text:span text:style-name="NormalTok"> <text:s/>showText</text:span><text:span text:style-name="OperatorTok">(</text:span><text:span text:style-name="NormalTok">currentText</text:span><text:span text:style-name="OperatorTok">);</text:span><text:line-break/><text:span text:style-name="NormalTok"> <text:s/>sendCurrentText</text:span><text:span text:style-name="OperatorTok">();</text:span><text:line-break/><text:span text:style-name="NormalTok"> <text:s/></text:span><text:span text:style-name="ControlFlowTok">return</text:span><text:span text:style-name="OperatorTok">;</text:span><text:line-break/><text:span text:style-name="OperatorTok">}</text:span><text:line-break/><text:line-break/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command</text:span><text:span text:style-name="OperatorTok">,</text:span><text:span text:style-name="NormalTok"> </text:span><text:span text:style-name="StringTok">"OLED_READ?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<text:line-break/><text:span text:style-name="NormalTok"> <text:s/>sendCurrentText</text:span><text:span text:style-name="OperatorTok">();</text:span><text:line-break/><text:soft-page-break/><text:span text:style-name="NormalTok"> <text:s/></text:span><text:span text:style-name="ControlFlowTok">return</text:span><text:span text:style-name="OperatorTok">;</text:span><text:line-break/><text:span text:style-name="OperatorTok">}</text:span></text:p>
      <text:p text:style-name="First_20_Paragraph">Передача bitmap устроена иначе: сначала Arduino отправляет текстовый заголовок, затем 1024 бинарных байта. 1024 байта соответствуют монохромному изображению 128×64, где 1 бит описывает 1 пиксель.</text:p>
      <text:p text:style-name="Source_20_Code"><text:span text:style-name="DataTypeTok">void</text:span><text:span text:style-name="NormalTok"> sendImage</text:span><text:span text:style-name="OperatorTok">()</text:span><text:span text:style-name="NormalTok"> </text:span><text:span text:style-name="OperatorTok">{</text:span><text:line-break/><text:span text:style-name="NormalTok"> <text:s/></text:span><text:span text:style-name="AttributeTok">const</text:span><text:span text:style-name="NormalTok"> </text:span><text:span text:style-name="DataTypeTok">int</text:span><text:span text:style-name="NormalTok"> bufferSize </text:span><text:span text:style-name="OperatorTok">=</text:span><text:span text:style-name="NormalTok"> </text:span><text:span text:style-name="DecValTok">32</text:span><text:span text:style-name="OperatorTok">;</text:span><text:line-break/><text:span text:style-name="NormalTok"> <text:s/>byte buffer</text:span><text:span text:style-name="OperatorTok">[</text:span><text:span text:style-name="NormalTok">bufferSize</text:span><text:span text:style-name="OperatorTok">];</text:span><text:line-break/><text:line-break/><text:span text:style-name="NormalTok"> <text:s/>Serial</text:span><text:span text:style-name="OperatorTok">.</text:span><text:span text:style-name="NormalTok">print</text:span><text:span text:style-name="OperatorTok">(</text:span><text:span text:style-name="StringTok">"#OLED_BITMAP:"</text:span><text:span text:style-name="OperatorTok">);</text:span><text:line-break/><text:span text:style-name="NormalTok"> <text:s/>Serial</text:span><text:span text:style-name="OperatorTok">.</text:span><text:span text:style-name="NormalTok">println</text:span><text:span text:style-name="OperatorTok">(</text:span><text:span text:style-name="NormalTok">myBitmapSize</text:span><text:span text:style-name="OperatorTok">);</text:span><text:line-break/><text:line-break/><text:span text:style-name="NormalTok"> <text:s/></text:span><text:span text:style-name="ControlFlowTok">for</text:span><text:span text:style-name="NormalTok"> </text:span><text:span text:style-name="OperatorTok">(</text:span><text:span text:style-name="DataTypeTok">unsigned</text:span><text:span text:style-name="NormalTok"> 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myBitmapSize</text:span><text:span text:style-name="OperatorTok">;</text:span><text:span text:style-name="NormalTok"> i </text:span><text:span text:style-name="OperatorTok">+=</text:span><text:span text:style-name="NormalTok"> bufferSize</text:span><text:span text:style-name="OperatorTok">)</text:span><text:span text:style-name="NormalTok"> </text:span><text:span text:style-name="OperatorTok">{</text:span><text:line-break/><text:span text:style-name="NormalTok"> <text:s text:c="3"/></text:span><text:span text:style-name="DataTypeTok">int</text:span><text:span text:style-name="NormalTok"> chunkSize </text:span><text:span text:style-name="OperatorTok">=</text:span><text:span text:style-name="NormalTok"> min</text:span><text:span text:style-name="OperatorTok">(</text:span><text:span text:style-name="NormalTok">bufferSize</text:span><text:span text:style-name="OperatorTok">,</text:span><text:span text:style-name="NormalTok"> </text:span><text:span text:style-name="OperatorTok">(</text:span><text:span text:style-name="DataTypeTok">int</text:span><text:span text:style-name="OperatorTok">)(</text:span><text:span text:style-name="NormalTok">myBitmapSize </text:span><text:span text:style-name="OperatorTok">-</text:span><text:span text:style-name="NormalTok"> i</text:span><text:span text:style-name="OperatorTok">));</text:span><text:line-break/><text:span text:style-name="NormalTok"> <text:s text:c="3"/>memcpy_P</text:span><text:span text:style-name="OperatorTok">(</text:span><text:span text:style-name="NormalTok">buffer</text:span><text:span text:style-name="OperatorTok">,</text:span><text:span text:style-name="NormalTok"> </text:span><text:span text:style-name="OperatorTok">&amp;</text:span><text:span text:style-name="NormalTok">myBitmap</text:span><text:span text:style-name="OperatorTok">[</text:span><text:span text:style-name="NormalTok">i</text:span><text:span text:style-name="OperatorTok">],</text:span><text:span text:style-name="NormalTok"> chunkSize</text:span><text:span text:style-name="OperatorTok">);</text:span><text:line-break/><text:span text:style-name="NormalTok"> <text:s text:c="3"/>Serial</text:span><text:span text:style-name="OperatorTok">.</text:span><text:span text:style-name="NormalTok">write</text:span><text:span text:style-name="OperatorTok">(</text:span><text:span text:style-name="NormalTok">buffer</text:span><text:span text:style-name="OperatorTok">,</text:span><text:span text:style-name="NormalTok"> chunkSize</text:span><text:span text:style-name="OperatorTok">);</text:span><text:line-break/><text:span text:style-name="NormalTok"> <text:s/></text:span><text:span text:style-name="OperatorTok">}</text:span><text:line-break/><text:span text:style-name="OperatorTok">}</text:span><text:bookmark-end text:name="реализация-на-arduino"/></text:p>
      <text:h text:style-name="Heading_20_2" text:outline-level="2"><text:bookmark-start text:name="реализация-в-веб-интерфейсе"/>Реализация в веб-интерфейсе</text:h>
      <text:p text:style-name="First_20_Paragraph">В интерфейсе есть OLED-панель:</text:p>
      <text:list text:continue-list="list1351421357511" text:style-name="WWNum1004">
        <text:list-item>
          <text:p text:style-name="P30">canvas preview 128×64;</text:p>
        </text:list-item>
        <text:list-item>
          <text:p text:style-name="P30">поле ввода текста;</text:p>
        </text:list-item>
        <text:list-item>
          <text:p text:style-name="P30">кнопки <text:span text:style-name="Verbatim_20_Char">Отправить текст</text:span>, <text:span text:style-name="Verbatim_20_Char">Читать</text:span>, <text:span text:style-name="Verbatim_20_Char">Bitmap</text:span>, <text:span text:style-name="Verbatim_20_Char">Углы</text:span>;</text:p>
        </text:list-item>
        <text:list-item>
          <text:p text:style-name="P30">Serial Monitor с TX/RX логом.</text:p>
        </text:list-item>
      </text:list>
      <text:p text:style-name="First_20_Paragraph">Фрагмент HTML:</text:p>
      <text:p text:style-name="Source_20_Code"><text:span text:style-name="DataTypeTok">&lt;</text:span><text:span text:style-name="KeywordTok">canvas</text:span><text:line-break/><text:span text:style-name="OtherTok"> <text:s/>class</text:span><text:span text:style-name="OperatorTok">=</text:span><text:span text:style-name="StringTok">"oled-preview"</text:span><text:line-break/><text:span text:style-name="OtherTok"> <text:s/>id</text:span><text:span text:style-name="OperatorTok">=</text:span><text:span text:style-name="StringTok">"oledPreview"</text:span><text:line-break/><text:span text:style-name="OtherTok"> <text:s/>width</text:span><text:span text:style-name="OperatorTok">=</text:span><text:span text:style-name="StringTok">"128"</text:span><text:line-break/><text:span text:style-name="OtherTok"> <text:s/>height</text:span><text:span text:style-name="OperatorTok">=</text:span><text:span text:style-name="StringTok">"64"</text:span><text:line-break/><text:span text:style-name="OtherTok"> <text:s/>aria-label</text:span><text:span text:style-name="OperatorTok">=</text:span><text:span text:style-name="StringTok">"OLED preview"</text:span><text:line-break/><text:span text:style-name="DataTypeTok">&gt;&lt;/</text:span><text:span text:style-name="KeywordTok">canvas</text:span><text:span text:style-name="DataTypeTok">&gt;</text:span><text:line-break/><text:line-break/><text:span text:style-name="DataTypeTok">&lt;</text:span><text:span text:style-name="KeywordTok">input</text:span><text:line-break/><text:span text:style-name="OtherTok"> <text:s/>type</text:span><text:span text:style-name="OperatorTok">=</text:span><text:span text:style-name="StringTok">"text"</text:span><text:line-break/><text:span text:style-name="OtherTok"> <text:s/>class</text:span><text:span text:style-name="OperatorTok">=</text:span><text:span text:style-name="StringTok">"monitor-input__field oled-input"</text:span><text:line-break/><text:span text:style-name="OtherTok"> <text:s/>id</text:span><text:span text:style-name="OperatorTok">=</text:span><text:span text:style-name="StringTok">"oledTextInput"</text:span><text:line-break/><text:span text:style-name="OtherTok"> <text:s/>maxlength</text:span><text:span text:style-name="OperatorTok">=</text:span><text:span text:style-name="StringTok">"80"</text:span><text:line-break/><text:span text:style-name="OtherTok"> <text:s/>aria-label</text:span><text:span text:style-name="OperatorTok">=</text:span><text:span text:style-name="StringTok">"Текст OLED"</text:span><text:line-break/><text:span text:style-name="DataTypeTok">/&gt;</text:span></text:p>
      <text:p text:style-name="First_20_Paragraph">Обработчик отправки текста:</text:p>
      <text:p text:style-name="Source_20_Code"><text:soft-page-break/><text:span text:style-name="KeywordTok">async</text:span><text:span text:style-name="NormalTok"> </text:span><text:span text:style-name="KeywordTok">function</text:span><text:span text:style-name="NormalTok"> </text:span><text:span text:style-name="FunctionTok">sendTextToOled</text:span><text:span text:style-name="NormalTok">() {</text:span><text:line-break/><text:span text:style-name="NormalTok"> <text:s/></text:span><text:span text:style-name="KeywordTok">const</text:span><text:span text:style-name="NormalTok"> text </text:span><text:span text:style-name="OperatorTok">=</text:span><text:span text:style-name="NormalTok"> input</text:span><text:span text:style-name="OperatorTok">?.</text:span><text:span text:style-name="AttributeTok">value</text:span><text:span text:style-name="OperatorTok">.</text:span><text:span text:style-name="FunctionTok">trim</text:span><text:span text:style-name="NormalTok">() </text:span><text:span text:style-name="OperatorTok">||</text:span><text:span text:style-name="NormalTok"> </text:span><text:span text:style-name="StringTok">''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NormalTok">text) </text:span><text:span text:style-name="ControlFlowTok">return</text:span><text:line-break/><text:line-break/><text:span text:style-name="NormalTok"> <text:s/></text:span><text:span text:style-name="FunctionTok">setOledAnglesMode</text:span><text:span text:style-name="NormalTok">(</text:span><text:span text:style-name="KeywordTok">false</text:span><text:span text:style-name="NormalTok">)</text:span><text:line-break/><text:span text:style-name="NormalTok"> <text:s/></text:span><text:span text:style-name="FunctionTok">showOledText</text:span><text:span text:style-name="NormalTok">(text)</text:span><text:line-break/><text:span text:style-name="NormalTok"> <text:s/></text:span><text:span text:style-name="ControlFlowTok">await</text:span><text:span text:style-name="NormalTok"> </text:span><text:span text:style-name="FunctionTok">sendCommand</text:span><text:span text:style-name="NormalTok">(</text:span><text:span text:style-name="VerbatimStringTok">`OLED_TEXT:</text:span><text:span text:style-name="SpecialCharTok">${</text:span><text:span text:style-name="NormalTok">text</text:span><text:span text:style-name="SpecialCharTok">}</text:span><text:span text:style-name="VerbatimStringTok">;`</text:span><text:span text:style-name="NormalTok">)</text:span><text:line-break/><text:span text:style-name="NormalTok">}</text:span></text:p>
      <text:p text:style-name="First_20_Paragraph">Обработчик входящих текстовых строк:</text:p>
      <text:p text:style-name="Source_20_Code"><text:span text:style-name="NormalTok">serial</text:span><text:span text:style-name="OperatorTok">.</text:span><text:span text:style-name="FunctionTok">onReceive</text:span><text:span text:style-name="NormalTok">((data) </text:span><text:span text:style-name="KeywordTok">=&gt;</text:span><text:span text:style-name="NormalTok"> {</text:span><text:line-break/><text:span text:style-name="NormalTok"> <text:s/>lastReceivedLine </text:span><text:span text:style-name="OperatorTok">=</text:span><text:span text:style-name="NormalTok"> data</text:span><text:line-break/><text:span text:style-name="NormalTok"> <text:s/></text:span><text:span text:style-name="FunctionTok">addLogEntry</text:span><text:span text:style-name="NormalTok">(</text:span><text:span text:style-name="StringTok">'rx'</text:span><text:span text:style-name="OperatorTok">,</text:span><text:span text:style-name="NormalTok"> data)</text:span><text:line-break/><text:line-break/><text:span text:style-name="NormalTok"> <text:s/></text:span><text:span text:style-name="KeywordTok">const</text:span><text:span text:style-name="NormalTok"> oledText </text:span><text:span text:style-name="OperatorTok">=</text:span><text:span text:style-name="NormalTok"> </text:span><text:span text:style-name="FunctionTok">extractOledText</text:span><text:span text:style-name="NormalTok">(data)</text:span><text:line-break/><text:span text:style-name="NormalTok"> <text:s/></text:span><text:span text:style-name="ControlFlowTok">if</text:span><text:span text:style-name="NormalTok"> (oledText </text:span><text:span text:style-name="OperatorTok">!==</text:span><text:span text:style-name="NormalTok"> </text:span><text:span text:style-name="KeywordTok">null</text:span><text:span text:style-name="NormalTok">) {</text:span><text:line-break/><text:span text:style-name="NormalTok"> <text:s text:c="3"/></text:span><text:span text:style-name="FunctionTok">showOledText</text:span><text:span text:style-name="NormalTok">(oledText)</text:span><text:line-break/><text:span text:style-name="NormalTok"> <text:s/>}</text:span><text:line-break/><text:span text:style-name="NormalTok">})</text:span></text:p>
      <text:p text:style-name="First_20_Paragraph">Для bitmap используется отдельный callback:</text:p>
      <text:p text:style-name="Source_20_Code"><text:span text:style-name="NormalTok">serial</text:span><text:span text:style-name="OperatorTok">.</text:span><text:span text:style-name="FunctionTok">onBitmapReceive</text:span><text:span text:style-name="NormalTok">((data) </text:span><text:span text:style-name="KeywordTok">=&gt;</text:span><text:span text:style-name="NormalTok"> {</text:span><text:line-break/><text:span text:style-name="NormalTok"> <text:s/></text:span><text:span text:style-name="FunctionTok">showOledBitmap</text:span><text:span text:style-name="NormalTok">(data)</text:span><text:line-break/><text:span text:style-name="NormalTok"> <text:s/></text:span><text:span text:style-name="FunctionTok">addLogEntry</text:span><text:span text:style-name="NormalTok">(</text:span><text:span text:style-name="StringTok">'rx'</text:span><text:span text:style-name="OperatorTok">,</text:span><text:span text:style-name="NormalTok"> </text:span><text:span text:style-name="VerbatimStringTok">`OLED bitmap received: </text:span><text:span text:style-name="SpecialCharTok">${</text:span><text:span text:style-name="NormalTok">data</text:span><text:span text:style-name="OperatorTok">.</text:span><text:span text:style-name="AttributeTok">length</text:span><text:span text:style-name="SpecialCharTok">}</text:span><text:span text:style-name="VerbatimStringTok"> bytes`</text:span><text:span text:style-name="NormalTok">)</text:span><text:line-break/><text:span text:style-name="NormalTok">})</text:span><text:bookmark-end text:name="реализация-в-веб-интерфейсе"/></text:p>
      <text:h text:style-name="Heading_20_2" text:outline-level="2"><text:bookmark-start text:name="формирование-oled-текстуры-в-three.js"/>Формирование OLED-текстуры в Three.js</text:h>
      <text:p text:style-name="First_20_Paragraph">В проекте OLED отображается не только на физическом дисплее и в HTML preview, но и на 3D-модели роборуки. Для этого используется canvas 128×64, совпадающий с разрешением SSD1306.</text:p>
      <text:p text:style-name="Text_20_body">В <text:span text:style-name="Verbatim_20_Char">src/viewer3d.ts</text:span> задаются размеры OLED и имя mesh в GLB-модели:</text:p>
      <text:p text:style-name="Source_20_Code"><text:span text:style-name="KeywordTok">const</text:span><text:span text:style-name="NormalTok"> OLED_WIDTH </text:span><text:span text:style-name="OperatorTok">=</text:span><text:span text:style-name="NormalTok"> </text:span><text:span text:style-name="DecValTok">128</text:span><text:line-break/><text:span text:style-name="KeywordTok">const</text:span><text:span text:style-name="NormalTok"> OLED_HEIGHT </text:span><text:span text:style-name="OperatorTok">=</text:span><text:span text:style-name="NormalTok"> </text:span><text:span text:style-name="DecValTok">64</text:span><text:line-break/><text:span text:style-name="KeywordTok">const</text:span><text:span text:style-name="NormalTok"> OLED_SCREEN_NAME </text:span><text:span text:style-name="OperatorTok">=</text:span><text:span text:style-name="NormalTok"> </text:span><text:span text:style-name="StringTok">"OLED_SCREEN"</text:span></text:p>
      <text:p text:style-name="First_20_Paragraph">Сначала создаётся offscreen canvas:</text:p>
      <text:p text:style-name="Source_20_Code"><text:span text:style-name="KeywordTok">function</text:span><text:span text:style-name="NormalTok"> </text:span><text:span text:style-name="FunctionTok">ensureOledCanvas</text:span><text:span text:style-name="NormalTok">() {</text:span><text:line-break/><text:span text:style-name="NormalTok"> <text:s/></text:span><text:span text:style-name="ControlFlowTok">if</text:span><text:span text:style-name="NormalTok"> (oledCanvas </text:span><text:span text:style-name="OperatorTok">&amp;&amp;</text:span><text:span text:style-name="NormalTok"> oledCtx) </text:span><text:span text:style-name="ControlFlowTok">return</text:span><text:line-break/><text:line-break/><text:span text:style-name="NormalTok"> <text:s/>oledCanvas </text:span><text:span text:style-name="OperatorTok">=</text:span><text:span text:style-name="NormalTok"> </text:span><text:span text:style-name="BuiltInTok">document</text:span><text:span text:style-name="OperatorTok">.</text:span><text:span text:style-name="FunctionTok">createElement</text:span><text:span text:style-name="NormalTok">(</text:span><text:span text:style-name="StringTok">"canvas"</text:span><text:span text:style-name="NormalTok">)</text:span><text:line-break/><text:span text:style-name="NormalTok"> <text:s/>oledCanvas</text:span><text:span text:style-name="OperatorTok">.</text:span><text:span text:style-name="AttributeTok">width</text:span><text:span text:style-name="NormalTok"> </text:span><text:span text:style-name="OperatorTok">=</text:span><text:span text:style-name="NormalTok"> OLED_WIDTH</text:span><text:line-break/><text:span text:style-name="NormalTok"> <text:s/>oledCanvas</text:span><text:span text:style-name="OperatorTok">.</text:span><text:span text:style-name="AttributeTok">height</text:span><text:span text:style-name="NormalTok"> </text:span><text:span text:style-name="OperatorTok">=</text:span><text:span text:style-name="NormalTok"> OLED_HEIGHT</text:span><text:line-break/><text:span text:style-name="NormalTok"> <text:s/>oledCtx </text:span><text:span text:style-name="OperatorTok">=</text:span><text:span text:style-name="NormalTok"> oledCanvas</text:span><text:span text:style-name="OperatorTok">.</text:span><text:span text:style-name="FunctionTok">getContext</text:span><text:span text:style-name="NormalTok">(</text:span><text:span text:style-name="StringTok">"2d"</text:span><text:span text:style-name="NormalTok">)</text:span><text:line-break/><text:line-break/><text:span text:style-name="NormalTok"> <text:s/></text:span><text:span text:style-name="ControlFlowTok">if</text:span><text:span text:style-name="NormalTok"> (oledCtx) {</text:span><text:line-break/><text:span text:style-name="NormalTok"> <text:s text:c="3"/>oledCtx</text:span><text:span text:style-name="OperatorTok">.</text:span><text:span text:style-name="AttributeTok">imageSmoothingEnabled</text:span><text:span text:style-name="NormalTok"> </text:span><text:span text:style-name="OperatorTok">=</text:span><text:span text:style-name="NormalTok"> </text:span><text:span text:style-name="KeywordTok">false</text:span><text:line-break/><text:soft-page-break/><text:span text:style-name="NormalTok"> <text:s/>}</text:span><text:line-break/><text:span text:style-name="NormalTok">}</text:span></text:p>
      <text:p text:style-name="First_20_Paragraph">Если приходит текст, он переносится по строкам и рисуется белым цветом на чёрном фоне:</text:p>
      <text:p text:style-name="Source_20_Code"><text:span text:style-name="KeywordTok">function</text:span><text:span text:style-name="NormalTok"> </text:span><text:span text:style-name="FunctionTok">drawTextToContext</text:span><text:span text:style-name="NormalTok">(text</text:span><text:span text:style-name="OperatorTok">:</text:span><text:span text:style-name="NormalTok"> </text:span><text:span text:style-name="DataTypeTok">string</text:span><text:span text:style-name="OperatorTok">,</text:span><text:span text:style-name="NormalTok"> ctx</text:span><text:span text:style-name="OperatorTok">:</text:span><text:span text:style-name="NormalTok"> </text:span><text:span text:style-name="BuiltInTok">CanvasRenderingContext2D</text:span><text:span text:style-name="NormalTok">) {</text:span><text:line-break/><text:span text:style-name="NormalTok"> <text:s/>ctx</text:span><text:span text:style-name="OperatorTok">.</text:span><text:span text:style-name="AttributeTok">fillStyle</text:span><text:span text:style-name="NormalTok"> </text:span><text:span text:style-name="OperatorTok">=</text:span><text:span text:style-name="NormalTok"> </text:span><text:span text:style-name="StringTok">"#fff"</text:span><text:line-break/><text:span text:style-name="NormalTok"> <text:s/>ctx</text:span><text:span text:style-name="OperatorTok">.</text:span><text:span text:style-name="AttributeTok">font</text:span><text:span text:style-name="NormalTok"> </text:span><text:span text:style-name="OperatorTok">=</text:span><text:span text:style-name="NormalTok"> </text:span><text:span text:style-name="StringTok">"10px monospace"</text:span><text:line-break/><text:span text:style-name="NormalTok"> <text:s/>ctx</text:span><text:span text:style-name="OperatorTok">.</text:span><text:span text:style-name="AttributeTok">textBaseline</text:span><text:span text:style-name="NormalTok"> </text:span><text:span text:style-name="OperatorTok">=</text:span><text:span text:style-name="NormalTok"> </text:span><text:span text:style-name="StringTok">"top"</text:span><text:line-break/><text:line-break/><text:span text:style-name="NormalTok"> <text:s/></text:span><text:span text:style-name="KeywordTok">const</text:span><text:span text:style-name="NormalTok"> lines </text:span><text:span text:style-name="OperatorTok">=</text:span><text:span text:style-name="NormalTok"> </text:span><text:span text:style-name="FunctionTok">wrapOledText</text:span><text:span text:style-name="NormalTok">(text)</text:span><text:line-break/><text:span text:style-name="NormalTok"> <text:s/>lines</text:span><text:span text:style-name="OperatorTok">.</text:span><text:span text:style-name="FunctionTok">slice</text:span><text:span text:style-name="NormalTok">(</text:span><text:span text:style-name="DecValTok">0</text:span><text:span text:style-name="OperatorTok">,</text:span><text:span text:style-name="NormalTok"> </text:span><text:span text:style-name="DecValTok">5</text:span><text:span text:style-name="NormalTok">)</text:span><text:span text:style-name="OperatorTok">.</text:span><text:span text:style-name="FunctionTok">forEach</text:span><text:span text:style-name="NormalTok">((line</text:span><text:span text:style-name="OperatorTok">,</text:span><text:span text:style-name="NormalTok"> index) </text:span><text:span text:style-name="KeywordTok">=&gt;</text:span><text:span text:style-name="NormalTok"> {</text:span><text:line-break/><text:span text:style-name="NormalTok"> <text:s text:c="3"/>ctx</text:span><text:span text:style-name="OperatorTok">.</text:span><text:span text:style-name="FunctionTok">fillText</text:span><text:span text:style-name="NormalTok">(line</text:span><text:span text:style-name="OperatorTok">,</text:span><text:span text:style-name="NormalTok"> </text:span><text:span text:style-name="DecValTok">4</text:span><text:span text:style-name="OperatorTok">,</text:span><text:span text:style-name="NormalTok"> </text:span><text:span text:style-name="DecValTok">4</text:span><text:span text:style-name="NormalTok"> </text:span><text:span text:style-name="OperatorTok">+</text:span><text:span text:style-name="NormalTok"> index </text:span><text:span text:style-name="OperatorTok">*</text:span><text:span text:style-name="NormalTok"> </text:span><text:span text:style-name="DecValTok">12</text:span><text:span text:style-name="NormalTok">)</text:span><text:line-break/><text:span text:style-name="NormalTok"> <text:s/>})</text:span><text:line-break/><text:span text:style-name="NormalTok">}</text:span></text:p>
      <text:p text:style-name="First_20_Paragraph">Если приходит bitmap, каждый бит преобразуется в RGBA-пиксель:</text:p>
      <text:p text:style-name="Source_20_Code"><text:span text:style-name="KeywordTok">function</text:span><text:span text:style-name="NormalTok"> </text:span><text:span text:style-name="FunctionTok">drawBitmapToContext</text:span><text:span text:style-name="NormalTok">(data</text:span><text:span text:style-name="OperatorTok">:</text:span><text:span text:style-name="NormalTok"> </text:span><text:span text:style-name="BuiltInTok">Uint8Array</text:span><text:span text:style-name="OperatorTok">,</text:span><text:span text:style-name="NormalTok"> ctx</text:span><text:span text:style-name="OperatorTok">:</text:span><text:span text:style-name="NormalTok"> </text:span><text:span text:style-name="BuiltInTok">CanvasRenderingContext2D</text:span><text:span text:style-name="NormalTok">) {</text:span><text:line-break/><text:span text:style-name="NormalTok"> <text:s/></text:span><text:span text:style-name="KeywordTok">const</text:span><text:span text:style-name="NormalTok"> imageData </text:span><text:span text:style-name="OperatorTok">=</text:span><text:span text:style-name="NormalTok"> ctx</text:span><text:span text:style-name="OperatorTok">.</text:span><text:span text:style-name="FunctionTok">createImageData</text:span><text:span text:style-name="NormalTok">(OLED_WIDTH</text:span><text:span text:style-name="OperatorTok">,</text:span><text:span text:style-name="NormalTok"> OLED_HEIGHT)</text:span><text:line-break/><text:line-break/><text:span text:style-name="NormalTok"> <text:s/></text:span><text:span text:style-name="ControlFlowTok">for</text:span><text:span text:style-name="NormalTok"> (</text:span><text:span text:style-name="KeywordTok">let</text:span><text:span text:style-name="NormalTok"> y </text:span><text:span text:style-name="OperatorTok">=</text:span><text:span text:style-name="NormalTok"> </text:span><text:span text:style-name="DecValTok">0</text:span><text:span text:style-name="OperatorTok">;</text:span><text:span text:style-name="NormalTok"> y </text:span><text:span text:style-name="OperatorTok">&lt;</text:span><text:span text:style-name="NormalTok"> OLED_HEIGHT</text:span><text:span text:style-name="OperatorTok">;</text:span><text:span text:style-name="NormalTok"> y</text:span><text:span text:style-name="OperatorTok">++</text:span><text:span text:style-name="NormalTok">) {</text:span><text:line-break/><text:span text:style-name="NormalTok"> <text:s text:c="3"/></text:span><text:span text:style-name="ControlFlowTok">for</text:span><text:span text:style-name="NormalTok"> (</text:span><text:span text:style-name="KeywordTok">let</text:span><text:span text:style-name="NormalTok"> x </text:span><text:span text:style-name="OperatorTok">=</text:span><text:span text:style-name="NormalTok"> </text:span><text:span text:style-name="DecValTok">0</text:span><text:span text:style-name="OperatorTok">;</text:span><text:span text:style-name="NormalTok"> x </text:span><text:span text:style-name="OperatorTok">&lt;</text:span><text:span text:style-name="NormalTok"> OLED_WIDTH</text:span><text:span text:style-name="OperatorTok">;</text:span><text:span text:style-name="NormalTok"> x</text:span><text:span text:style-name="OperatorTok">++</text:span><text:span text:style-name="NormalTok">) {</text:span><text:line-break/><text:span text:style-name="NormalTok"> <text:s text:c="5"/></text:span><text:span text:style-name="KeywordTok">const</text:span><text:span text:style-name="NormalTok"> byteIndex </text:span><text:span text:style-name="OperatorTok">=</text:span><text:span text:style-name="NormalTok"> y </text:span><text:span text:style-name="OperatorTok">*</text:span><text:span text:style-name="NormalTok"> (OLED_WIDTH </text:span><text:span text:style-name="OperatorTok">/</text:span><text:span text:style-name="NormalTok"> </text:span><text:span text:style-name="DecValTok">8</text:span><text:span text:style-name="NormalTok">) </text:span><text:span text:style-name="OperatorTok">+</text:span><text:span text:style-name="NormalTok"> </text:span><text:span text:style-name="BuiltInTok">Math</text:span><text:span text:style-name="OperatorTok">.</text:span><text:span text:style-name="FunctionTok">floor</text:span><text:span text:style-name="NormalTok">(x </text:span><text:span text:style-name="OperatorTok">/</text:span><text:span text:style-name="NormalTok"> </text:span><text:span text:style-name="DecValTok">8</text:span><text:span text:style-name="NormalTok">)</text:span><text:line-break/><text:span text:style-name="NormalTok"> <text:s text:c="5"/></text:span><text:span text:style-name="KeywordTok">const</text:span><text:span text:style-name="NormalTok"> bit </text:span><text:span text:style-name="OperatorTok">=</text:span><text:span text:style-name="NormalTok"> </text:span><text:span text:style-name="DecValTok">7</text:span><text:span text:style-name="NormalTok"> </text:span><text:span text:style-name="OperatorTok">-</text:span><text:span text:style-name="NormalTok"> (x </text:span><text:span text:style-name="OperatorTok">%</text:span><text:span text:style-name="NormalTok"> </text:span><text:span text:style-name="DecValTok">8</text:span><text:span text:style-name="NormalTok">)</text:span><text:line-break/><text:span text:style-name="NormalTok"> <text:s text:c="5"/></text:span><text:span text:style-name="KeywordTok">const</text:span><text:span text:style-name="NormalTok"> on </text:span><text:span text:style-name="OperatorTok">=</text:span><text:span text:style-name="NormalTok"> (data[byteIndex] </text:span><text:span text:style-name="OperatorTok">&amp;</text:span><text:span text:style-name="NormalTok"> (</text:span><text:span text:style-name="DecValTok">1</text:span><text:span text:style-name="NormalTok"> </text:span><text:span text:style-name="OperatorTok">&lt;&lt;</text:span><text:span text:style-name="NormalTok"> bit)) </text:span><text:span text:style-name="OperatorTok">!==</text:span><text:span text:style-name="NormalTok"> </text:span><text:span text:style-name="DecValTok">0</text:span><text:line-break/><text:span text:style-name="NormalTok"> <text:s text:c="5"/></text:span><text:span text:style-name="KeywordTok">const</text:span><text:span text:style-name="NormalTok"> pixelIndex </text:span><text:span text:style-name="OperatorTok">=</text:span><text:span text:style-name="NormalTok"> (y </text:span><text:span text:style-name="OperatorTok">*</text:span><text:span text:style-name="NormalTok"> OLED_WIDTH </text:span><text:span text:style-name="OperatorTok">+</text:span><text:span text:style-name="NormalTok"> x) </text:span><text:span text:style-name="OperatorTok">*</text:span><text:span text:style-name="NormalTok"> </text:span><text:span text:style-name="DecValTok">4</text:span><text:line-break/><text:span text:style-name="NormalTok"> <text:s text:c="5"/></text:span><text:span text:style-name="KeywordTok">const</text:span><text:span text:style-name="NormalTok"> value </text:span><text:span text:style-name="OperatorTok">=</text:span><text:span text:style-name="NormalTok"> on </text:span><text:span text:style-name="OperatorTok">?</text:span><text:span text:style-name="NormalTok"> </text:span><text:span text:style-name="DecValTok">255</text:span><text:span text:style-name="NormalTok"> </text:span><text:span text:style-name="OperatorTok">:</text:span><text:span text:style-name="NormalTok"> </text:span><text:span text:style-name="DecValTok">0</text:span><text:line-break/><text:line-break/><text:span text:style-name="NormalTok"> <text:s text:c="5"/>imageData</text:span><text:span text:style-name="OperatorTok">.</text:span><text:span text:style-name="AttributeTok">data</text:span><text:span text:style-name="NormalTok">[pixelIndex] </text:span><text:span text:style-name="OperatorTok">=</text:span><text:span text:style-name="NormalTok"> value</text:span><text:line-break/><text:span text:style-name="NormalTok"> <text:s text:c="5"/>imageData</text:span><text:span text:style-name="OperatorTok">.</text:span><text:span text:style-name="AttributeTok">data</text:span><text:span text:style-name="NormalTok">[pixelIndex </text:span><text:span text:style-name="OperatorTok">+</text:span><text:span text:style-name="NormalTok"> </text:span><text:span text:style-name="DecValTok">1</text:span><text:span text:style-name="NormalTok">] </text:span><text:span text:style-name="OperatorTok">=</text:span><text:span text:style-name="NormalTok"> value</text:span><text:line-break/><text:span text:style-name="NormalTok"> <text:s text:c="5"/>imageData</text:span><text:span text:style-name="OperatorTok">.</text:span><text:span text:style-name="AttributeTok">data</text:span><text:span text:style-name="NormalTok">[pixelIndex </text:span><text:span text:style-name="OperatorTok">+</text:span><text:span text:style-name="NormalTok"> </text:span><text:span text:style-name="DecValTok">2</text:span><text:span text:style-name="NormalTok">] </text:span><text:span text:style-name="OperatorTok">=</text:span><text:span text:style-name="NormalTok"> value</text:span><text:line-break/><text:span text:style-name="NormalTok"> <text:s text:c="5"/>imageData</text:span><text:span text:style-name="OperatorTok">.</text:span><text:span text:style-name="AttributeTok">data</text:span><text:span text:style-name="NormalTok">[pixelIndex </text:span><text:span text:style-name="OperatorTok">+</text:span><text:span text:style-name="NormalTok"> </text:span><text:span text:style-name="DecValTok">3</text:span><text:span text:style-name="NormalTok">] </text:span><text:span text:style-name="OperatorTok">=</text:span><text:span text:style-name="NormalTok"> </text:span><text:span text:style-name="DecValTok">255</text:span><text:line-break/><text:span text:style-name="NormalTok"> <text:s text:c="3"/>}</text:span><text:line-break/><text:span text:style-name="NormalTok"> <text:s/>}</text:span><text:line-break/><text:line-break/><text:span text:style-name="NormalTok"> <text:s/>ctx</text:span><text:span text:style-name="OperatorTok">.</text:span><text:span text:style-name="FunctionTok">putImageData</text:span><text:span text:style-name="NormalTok">(imageData</text:span><text:span text:style-name="OperatorTok">,</text:span><text:span text:style-name="NormalTok"> </text:span><text:span text:style-name="DecValTok">0</text:span><text:span text:style-name="OperatorTok">,</text:span><text:span text:style-name="NormalTok"> </text:span><text:span text:style-name="DecValTok">0</text:span><text:span text:style-name="NormalTok">)</text:span><text:line-break/><text:span text:style-name="NormalTok">}</text:span></text:p>
      <text:p text:style-name="First_20_Paragraph">Далее этот canvas становится текстурой Three.js:</text:p>
      <text:p text:style-name="Source_20_Code"><text:span text:style-name="NormalTok">oledTexture </text:span><text:span text:style-name="OperatorTok">=</text:span><text:span text:style-name="NormalTok"> </text:span><text:span text:style-name="KeywordTok">new</text:span><text:span text:style-name="NormalTok"> THREE</text:span><text:span text:style-name="OperatorTok">.</text:span><text:span text:style-name="FunctionTok">CanvasTexture</text:span><text:span text:style-name="NormalTok">(oledCanvas)</text:span><text:line-break/><text:span text:style-name="NormalTok">oledTexture</text:span><text:span text:style-name="OperatorTok">.</text:span><text:span text:style-name="AttributeTok">colorSpace</text:span><text:span text:style-name="NormalTok"> </text:span><text:span text:style-name="OperatorTok">=</text:span><text:span text:style-name="NormalTok"> THREE</text:span><text:span text:style-name="OperatorTok">.</text:span><text:span text:style-name="AttributeTok">SRGBColorSpace</text:span><text:line-break/><text:span text:style-name="NormalTok">oledTexture</text:span><text:span text:style-name="OperatorTok">.</text:span><text:span text:style-name="AttributeTok">magFilter</text:span><text:span text:style-name="NormalTok"> </text:span><text:span text:style-name="OperatorTok">=</text:span><text:span text:style-name="NormalTok"> THREE</text:span><text:span text:style-name="OperatorTok">.</text:span><text:span text:style-name="AttributeTok">NearestFilter</text:span><text:line-break/><text:span text:style-name="NormalTok">oledTexture</text:span><text:span text:style-name="OperatorTok">.</text:span><text:span text:style-name="AttributeTok">minFilter</text:span><text:span text:style-name="NormalTok"> </text:span><text:span text:style-name="OperatorTok">=</text:span><text:span text:style-name="NormalTok"> THREE</text:span><text:span text:style-name="OperatorTok">.</text:span><text:span text:style-name="AttributeTok">NearestFilter</text:span><text:line-break/><text:span text:style-name="NormalTok">oledTexture</text:span><text:span text:style-name="OperatorTok">.</text:span><text:span text:style-name="AttributeTok">flipY</text:span><text:span text:style-name="NormalTok"> </text:span><text:span text:style-name="OperatorTok">=</text:span><text:span text:style-name="NormalTok"> </text:span><text:span text:style-name="KeywordTok">false</text:span><text:line-break/><text:line-break/><text:span text:style-name="NormalTok">oledScreen</text:span><text:span text:style-name="OperatorTok">.</text:span><text:span text:style-name="AttributeTok">material</text:span><text:span text:style-name="NormalTok"> </text:span><text:span text:style-name="OperatorTok">=</text:span><text:span text:style-name="NormalTok"> </text:span><text:span text:style-name="KeywordTok">new</text:span><text:span text:style-name="NormalTok"> THREE</text:span><text:span text:style-name="OperatorTok">.</text:span><text:span text:style-name="FunctionTok">MeshBasicMaterial</text:span><text:span text:style-name="NormalTok">({</text:span><text:line-break/><text:span text:style-name="NormalTok"> <text:s/>map</text:span><text:span text:style-name="OperatorTok">:</text:span><text:span text:style-name="NormalTok"> oledTexture</text:span><text:span text:style-name="OperatorTok">,</text:span><text:line-break/><text:soft-page-break/><text:span text:style-name="NormalTok"> <text:s/>toneMapped</text:span><text:span text:style-name="OperatorTok">:</text:span><text:span text:style-name="NormalTok"> </text:span><text:span text:style-name="KeywordTok">false</text:span><text:span text:style-name="OperatorTok">,</text:span><text:line-break/><text:span text:style-name="NormalTok">})</text:span></text:p>
      <text:p text:style-name="First_20_Paragraph">После каждого изменения текста или bitmap выполняется:</text:p>
      <text:p text:style-name="Source_20_Code"><text:span text:style-name="ControlFlowTok">if</text:span><text:span text:style-name="NormalTok"> (oledTexture) {</text:span><text:line-break/><text:span text:style-name="NormalTok"> <text:s/>oledTexture</text:span><text:span text:style-name="OperatorTok">.</text:span><text:span text:style-name="AttributeTok">needsUpdate</text:span><text:span text:style-name="NormalTok"> </text:span><text:span text:style-name="OperatorTok">=</text:span><text:span text:style-name="NormalTok"> </text:span><text:span text:style-name="KeywordTok">true</text:span><text:line-break/><text:span text:style-name="NormalTok">}</text:span></text:p>
      <text:p text:style-name="First_20_Paragraph">Это сообщает Three.js, что canvas изменился и texture нужно обновить на GPU.</text:p>
      <text:p text:style-name="Text_20_body">Важно, что HTML preview и 3D-экран используют один и тот же источник изображения. Функция <text:span text:style-name="Verbatim_20_Char">renderOledPreview</text:span> просто копирует offscreen canvas в видимый canvas интерфейса:</text:p>
      <text:p text:style-name="Source_20_Code"><text:span text:style-name="ImportTok">export</text:span><text:span text:style-name="NormalTok"> </text:span><text:span text:style-name="KeywordTok">function</text:span><text:span text:style-name="NormalTok"> </text:span><text:span text:style-name="FunctionTok">renderOledPreview</text:span><text:span text:style-name="NormalTok">(canvas</text:span><text:span text:style-name="OperatorTok">:</text:span><text:span text:style-name="NormalTok"> </text:span><text:span text:style-name="BuiltInTok">HTMLCanvasElement</text:span><text:span text:style-name="NormalTok">) {</text:span><text:line-break/><text:span text:style-name="NormalTok"> <text:s/></text:span><text:span text:style-name="FunctionTok">ensureOledCanvas</text:span><text:span text:style-name="NormalTok">()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NormalTok">oledCanvas) </text:span><text:span text:style-name="ControlFlowTok">return</text:span><text:line-break/><text:line-break/><text:span text:style-name="NormalTok"> <text:s/>canvas</text:span><text:span text:style-name="OperatorTok">.</text:span><text:span text:style-name="AttributeTok">width</text:span><text:span text:style-name="NormalTok"> </text:span><text:span text:style-name="OperatorTok">=</text:span><text:span text:style-name="NormalTok"> OLED_WIDTH</text:span><text:line-break/><text:span text:style-name="NormalTok"> <text:s/>canvas</text:span><text:span text:style-name="OperatorTok">.</text:span><text:span text:style-name="AttributeTok">height</text:span><text:span text:style-name="NormalTok"> </text:span><text:span text:style-name="OperatorTok">=</text:span><text:span text:style-name="NormalTok"> OLED_HEIGHT</text:span><text:line-break/><text:span text:style-name="NormalTok"> <text:s/></text:span><text:span text:style-name="KeywordTok">const</text:span><text:span text:style-name="NormalTok"> ctx </text:span><text:span text:style-name="OperatorTok">=</text:span><text:span text:style-name="NormalTok"> canvas</text:span><text:span text:style-name="OperatorTok">.</text:span><text:span text:style-name="FunctionTok">getContext</text:span><text:span text:style-name="NormalTok">(</text:span><text:span text:style-name="StringTok">"2d"</text:span><text:span text:style-name="NormalTok">)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NormalTok">ctx) </text:span><text:span text:style-name="ControlFlowTok">return</text:span><text:line-break/><text:line-break/><text:span text:style-name="NormalTok"> <text:s/>ctx</text:span><text:span text:style-name="OperatorTok">.</text:span><text:span text:style-name="AttributeTok">imageSmoothingEnabled</text:span><text:span text:style-name="NormalTok"> </text:span><text:span text:style-name="OperatorTok">=</text:span><text:span text:style-name="NormalTok"> </text:span><text:span text:style-name="KeywordTok">false</text:span><text:line-break/><text:span text:style-name="NormalTok"> <text:s/>ctx</text:span><text:span text:style-name="OperatorTok">.</text:span><text:span text:style-name="FunctionTok">clearRect</text:span><text:span text:style-name="NormalTok">(</text:span><text:span text:style-name="DecValTok">0</text:span><text:span text:style-name="OperatorTok">,</text:span><text:span text:style-name="NormalTok"> </text:span><text:span text:style-name="DecValTok">0</text:span><text:span text:style-name="OperatorTok">,</text:span><text:span text:style-name="NormalTok"> canvas</text:span><text:span text:style-name="OperatorTok">.</text:span><text:span text:style-name="AttributeTok">width</text:span><text:span text:style-name="OperatorTok">,</text:span><text:span text:style-name="NormalTok"> canvas</text:span><text:span text:style-name="OperatorTok">.</text:span><text:span text:style-name="AttributeTok">height</text:span><text:span text:style-name="NormalTok">)</text:span><text:line-break/><text:span text:style-name="NormalTok"> <text:s/>ctx</text:span><text:span text:style-name="OperatorTok">.</text:span><text:span text:style-name="FunctionTok">drawImage</text:span><text:span text:style-name="NormalTok">(oledCanvas</text:span><text:span text:style-name="OperatorTok">,</text:span><text:span text:style-name="NormalTok"> </text:span><text:span text:style-name="DecValTok">0</text:span><text:span text:style-name="OperatorTok">,</text:span><text:span text:style-name="NormalTok"> </text:span><text:span text:style-name="DecValTok">0</text:span><text:span text:style-name="NormalTok">)</text:span><text:line-break/><text:span text:style-name="NormalTok">}</text:span></text:p>
      <text:p text:style-name="First_20_Paragraph">За счёт этого физический OLED, OLED preview в интерфейсе и экран на 3D-модели отображают один и тот же смысловой контент.<text:bookmark-end text:name="формирование-oled-текстуры-в-three.js"/></text:p>
      <text:h text:style-name="Heading_20_2" text:outline-level="2"><text:bookmark-start text:name="результаты-проверки"/>Результаты проверки</text:h>
      <text:p text:style-name="First_20_Paragraph">Проверка выполнялась на Arduino Uno без подключенного OLED-дисплея. Это позволило проверить Serial-протокол и mock-mode.</text:p>
      <text:p text:style-name="Text_20_body">После подключения через Web Serial API были получены стартовые сообщения:</text:p>
      <text:p text:style-name="Source_20_Code"><text:span text:style-name="Verbatim_20_Char">WARN SSD1306 not found, mock mode</text:span><text:line-break/><text:span text:style-name="Verbatim_20_Char">OK OLED mock ready</text:span><text:line-break/><text:span text:style-name="Verbatim_20_Char">%Khusainov AA 4241v%;</text:span></text:p>
      <text:p text:style-name="First_20_Paragraph">Команда отправки текста из интерфейса:</text:p>
      <text:p text:style-name="Source_20_Code"><text:span text:style-name="Verbatim_20_Char">TX OLED_TEXT:Interface OLED test;</text:span><text:line-break/><text:span text:style-name="Verbatim_20_Char">RX %Interface OLED test%;</text:span></text:p>
      <text:p text:style-name="First_20_Paragraph">Команда чтения текущего текста:</text:p>
      <text:p text:style-name="Source_20_Code"><text:span text:style-name="Verbatim_20_Char">TX OLED_READ?;</text:span><text:line-break/><text:span text:style-name="Verbatim_20_Char">RX %Interface OLED test%;</text:span></text:p>
      <text:p text:style-name="First_20_Paragraph">Режим отображения углов:</text:p>
      <text:p text:style-name="Source_20_Code"><text:soft-page-break/><text:span text:style-name="Verbatim_20_Char">TX OLED_ANGLES?;</text:span><text:line-break/><text:span text:style-name="Verbatim_20_Char">RX %A90 B90 C90 D90 E90%;</text:span></text:p>
      <text:p text:style-name="First_20_Paragraph">Передача bitmap:</text:p>
      <text:p text:style-name="Source_20_Code"><text:span text:style-name="Verbatim_20_Char">TX OLED_BITMAP?;</text:span><text:line-break/><text:span text:style-name="Verbatim_20_Char">RX OLED bitmap received: 1024 bytes</text:span><text:bookmark-end text:name="результаты-проверки"/></text:p>
      <text:h text:style-name="Heading_20_2" text:outline-level="2"><text:bookmark-start text:name="вывод"/>Вывод</text:h>
      <text:p text:style-name="First_20_Paragraph">В работе реализован полный контур управления OLED-дисплеем через веб-интерфейс. Arduino принимает текстовые команды по COM-порту, управляет OLED SSD1306 или работает в mock-mode без физического дисплея. Web Serial API позволяет браузеру Chrome/Edge напрямую обмениваться данными с Arduino после явного выбора порта пользователем.</text:p>
      <text:p text:style-name="Text_20_body">Отдельно реализовано отображение OLED-содержимого в Three.js: данные рисуются в canvas 128×64, затем этот canvas используется как <text:span text:style-name="Verbatim_20_Char">THREE.CanvasTexture</text:span> для mesh <text:span text:style-name="Verbatim_20_Char">OLED_SCREEN</text:span>. Благодаря этому интерфейс и 3D-модель показывают то же содержимое, которое выводится или должно выводиться на OLED-дисплей.<text:bookmark-end text:name="вывод"/><text:bookmark-end text:name="X318b530629edd0049822c83109e64e5aaaa7d9c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false" style:font-name-asian="Liberation Sans2" style:font-size-asian="12pt" style:language-asian="zh" style:country-asian="CN" style:font-name-complex="Liberation Sans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ru" fo:country="RU" style:letter-kerning="false" style:font-name-asian="Liberation Sans2" style:font-size-asian="12pt" style:language-asian="zh" style:country-asian="CN" style:font-name-complex="Liberation Sans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style:font-name-asian="Liberation Sans2" style:font-family-asian="'Liberation Sans'" style:font-family-generic-asian="system" style:font-pitch-asian="variable" style:font-size-asian="28pt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102in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Author" style:family="paragraph" style:parent-style-name="Title" style:next-style-name="Text_20_body">
      <style:paragraph-properties fo:keep-together="always" fo:keep-with-next="always"/>
      <style:text-properties fo:font-size="12pt" style:font-size-asian="12pt" style:font-size-complex="12pt"/>
    </style:style>
    <style:style style:name="Date" style:family="paragraph" style:parent-style-name="Title" style:next-style-name="Text_20_body">
      <style:paragraph-properties fo:keep-together="always" fo:keep-with-next="always"/>
      <style:text-properties fo:font-size="12pt" style:font-size-asian="12pt" style:font-size-complex="12pt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Liberation Sans2" style:font-family-asian="'Liberation Sans'" style:font-family-generic-asian="system" style:font-pitch-asian="variable" style:font-size-asian="20pt" style:font-name-complex="Liberation Sans2" style:font-family-complex="'Liberation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Liberation Sans2" style:font-family-asian="'Liberation Sans'" style:font-family-generic-asian="system" style:font-pitch-asian="variable" style:font-size-asian="16pt" style:font-name-complex="Liberation Sans2" style:font-family-complex="'Liberation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Liberation Sans2" style:font-family-asian="'Liberation Sans'" style:font-family-generic-asian="system" style:font-pitch-asian="variable" style:font-style-asian="italic" style:font-name-complex="Liberation Sans2" style:font-family-complex="'Liberation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Liberation Sans2" style:font-family-asian="'Liberation Sans'" style:font-family-generic-asian="system" style:font-pitch-asian="variable" style:font-name-complex="Liberation Sans2" style:font-family-complex="'Liberation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Liberation Sans2" style:font-family-asian="'Liberation Sans'" style:font-family-generic-asian="system" style:font-pitch-asian="variable" style:font-style-asian="italic" style:font-name-complex="Liberation Sans2" style:font-family-complex="'Liberation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Liberation Sans2" style:font-family-asian="'Liberation Sans'" style:font-family-generic-asian="system" style:font-pitch-asian="variable" style:font-name-complex="Liberation Sans2" style:font-family-complex="'Liberation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Liberation Sans2" style:font-family-asian="'Liberation Sans'" style:font-family-generic-asian="system" style:font-pitch-asian="variable" style:font-style-asian="italic" style:font-name-complex="Liberation Sans2" style:font-family-complex="'Liberation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Liberation Sans2" style:font-family-asian="'Liberation Sans'" style:font-family-generic-asian="system" style:font-pitch-asian="variable" style:font-name-complex="Liberation Sans2" style:font-family-complex="'Liberation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Liberation Sans2" style:font-family-asian="'Liberation Sans'" style:font-family-generic-asian="system" style:font-pitch-asian="variable" style:font-weight-asian="normal" style:font-name-complex="Liberation Sans2" style:font-family-complex="'Liberation Sans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style:font-name-asian="Liberation Sans2" style:font-family-asian="'Liberation Sans'" style:font-family-generic-asian="system" style:font-pitch-asian="variable" style:font-size-asian="28pt" style:font-name-complex="Liberation Sans2" style:font-family-complex="'Liberation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Liberation Sans2" style:font-family-asian="'Liberation Sans'" style:font-family-generic-asian="system" style:font-pitch-asian="variable" style:font-size-asian="20pt" style:font-name-complex="Liberation Sans2" style:font-family-complex="'Liberation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Liberation Sans2" style:font-family-asian="'Liberation Sans'" style:font-family-generic-asian="system" style:font-pitch-asian="variable" style:font-size-asian="16pt" style:font-name-complex="Liberation Sans2" style:font-family-complex="'Liberation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Liberation Sans2" style:font-family-asian="'Liberation Sans'" style:font-family-generic-asian="system" style:font-pitch-asian="variable" style:font-style-asian="italic" style:font-name-complex="Liberation Sans2" style:font-family-complex="'Liberation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Liberation Sans2" style:font-family-asian="'Liberation Sans'" style:font-family-generic-asian="system" style:font-pitch-asian="variable" style:font-name-complex="Liberation Sans2" style:font-family-complex="'Liberation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Liberation Sans2" style:font-family-asian="'Liberation Sans'" style:font-family-generic-asian="system" style:font-pitch-asian="variable" style:font-style-asian="italic" style:font-name-complex="Liberation Sans2" style:font-family-complex="'Liberation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Liberation Sans2" style:font-family-asian="'Liberation Sans'" style:font-family-generic-asian="system" style:font-pitch-asian="variable" style:font-name-complex="Liberation Sans2" style:font-family-complex="'Liberation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Liberation Sans2" style:font-family-asian="'Liberation Sans'" style:font-family-generic-asian="system" style:font-pitch-asian="variable" style:font-style-asian="italic" style:font-name-complex="Liberation Sans2" style:font-family-complex="'Liberation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Liberation Sans2" style:font-family-asian="'Liberation Sans'" style:font-family-generic-asian="system" style:font-pitch-asian="variable" style:font-name-complex="Liberation Sans2" style:font-family-complex="'Liberation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Лабораторная работа: OLED-дисплей, Web Serial API и отображение в 3D-интерфейсе</dc:title>
    <meta:initial-creator>Khusainov AA 4241v</meta:initial-creator>
    <dc:language>ru-RU</dc:language>
    <meta:creation-date>2026-05-20T10:28:54</meta:creation-date>
    <dc:date>2026-05-27T00:11:51.290974796</dc:date>
    <meta:generator>LibreOffice/26.2.3.2$Linux_X86_64 LibreOffice_project/620$Build-2</meta:generator>
    <meta:editing-duration>PT28M42S</meta:editing-duration>
    <meta:editing-cycles>3</meta:editing-cycles>
    <meta:document-statistic meta:table-count="5" meta:image-count="6" meta:object-count="0" meta:page-count="15" meta:paragraph-count="149" meta:word-count="1564" meta:character-count="12593" meta:non-whitespace-character-count="10842"/>
    <meta:user-defined meta:name="AppVersion">12.0000</meta:user-defined>
    <meta:user-defined meta:name="date">20.05.2026</meta:user-defined>
    <meta:template xlink:type="simple" xlink:actuate="onRequest" xlink:title="Normal.dotm" xlink:href=""/>
  </office:meta>
</office:document-meta>
</file>