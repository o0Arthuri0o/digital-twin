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6.6972in" fo:margin-left="0.0007in" fo:margin-top="0in" fo:margin-bottom="0in" table:align="left" style:writing-mode="page"/>
    </style:style>
    <style:style style:name="Table2.A" style:family="table-column">
      <style:table-column-properties style:column-width="6.6972in"/>
    </style:style>
    <style:style style:name="Table2.1" style:family="table-row">
      <style:table-row-properties style:row-height="0.86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6972in" fo:margin-left="0.0007in" fo:margin-top="0in" fo:margin-bottom="0in" table:align="left" style:writing-mode="page"/>
    </style:style>
    <style:style style:name="Table3.A" style:family="table-column">
      <style:table-column-properties style:column-width="2.2639in"/>
    </style:style>
    <style:style style:name="Table3.B" style:family="table-column">
      <style:table-column-properties style:column-width="0.1972in"/>
    </style:style>
    <style:style style:name="Table3.C" style:family="table-column">
      <style:table-column-properties style:column-width="1.9667in"/>
    </style:style>
    <style:style style:name="Table3.D" style:family="table-column">
      <style:table-column-properties style:column-width="0.1639in"/>
    </style:style>
    <style:style style:name="Table3.E" style:family="table-column">
      <style:table-column-properties style:column-width="2.105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6.6938in" fo:margin-left="0.0007in" fo:margin-top="0in" fo:margin-bottom="0in" table:align="left" style:writing-mode="page"/>
    </style:style>
    <style:style style:name="Table4.A" style:family="table-column">
      <style:table-column-properties style:column-width="6.69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A2" style:family="table-cell">
      <style:table-cell-properties fo:padding-left="0.075in" fo:padding-right="0.075in" fo:padding-top="0in" fo:padding-bottom="0in" fo:border="none"/>
    </style:style>
    <style:style style:name="Table4.3" style:family="table-row">
      <style:table-row-properties style:min-row-height="0.7875in" fo:keep-together="auto"/>
    </style:style>
    <style:style style:name="Table4.A3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6938in" fo:margin-left="0.0007in" fo:margin-top="0in" fo:margin-bottom="0in" table:align="left" style:writing-mode="page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1.0819in"/>
    </style:style>
    <style:style style:name="Table5.C" style:family="table-column">
      <style:table-column-properties style:column-width="0.1646in"/>
    </style:style>
    <style:style style:name="Table5.D" style:family="table-column">
      <style:table-column-properties style:column-width="1.8326in"/>
    </style:style>
    <style:style style:name="Table5.E" style:family="table-column">
      <style:table-column-properties style:column-width="0.1639in"/>
    </style:style>
    <style:style style:name="Table5.F" style:family="table-column">
      <style:table-column-properties style:column-width="1.8257in"/>
    </style:style>
    <style:style style:name="Table5.1" style:family="table-row">
      <style:table-row-properties style:min-row-height="0.2361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5.2" style:family="table-row">
      <style:table-row-properties style:min-row-height="0.116in" fo:keep-together="auto"/>
    </style:style>
    <style:style style:name="Table5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Table5.3" style:family="table-row">
      <style:table-row-properties style:min-row-height="0.4403in" fo:keep-together="auto"/>
    </style:style>
    <style:style style:name="Table1" style:family="table">
      <style:table-properties style:width="5.5in" fo:margin-left="-0.075in" fo:margin-top="0in" fo:margin-bottom="0in" table:align="left" style:writing-mode="lr-tb"/>
    </style:style>
    <style:style style:name="Table1.A" style:family="table-column">
      <style:table-column-properties style:column-width="1.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Table1.B2" style:family="table-cell">
      <style:table-cell-properties fo:padding-left="0.075in" fo:padding-right="0.075in" fo:padding-top="0in" fo:padding-bottom="0in" fo:border="none" style:writing-mode="lr-tb"/>
    </style:style>
    <style:style style:name="Table1.C2" style:family="table-cell">
      <style:table-cell-properties fo:padding-left="0.075in" fo:padding-right="0.075in" fo:padding-top="0in" fo:padding-bottom="0in" fo:border="none" style:writing-mode="lr-tb"/>
    </style:style>
    <style:style style:name="Table1.D2" style:family="table-cell">
      <style:table-cell-properties fo:padding-left="0.075in" fo:padding-right="0.075in" fo:padding-top="0in" fo:padding-bottom="0in" fo:border="none" style:writing-mode="lr-tb"/>
    </style:style>
    <style:style style:name="Table1.E2" style:family="table-cell">
      <style:table-cell-properties fo:padding-left="0.075in" fo:padding-right="0.075in" fo:padding-top="0in" fo:padding-bottom="0in" fo:border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Table1.C3" style:family="table-cell">
      <style:table-cell-properties fo:padding-left="0.075in" fo:padding-right="0.075in" fo:padding-top="0in" fo:padding-bottom="0in" fo:border="none" style:writing-mode="lr-tb"/>
    </style:style>
    <style:style style:name="Table1.D3" style:family="table-cell">
      <style:table-cell-properties fo:padding-left="0.075in" fo:padding-right="0.075in" fo:padding-top="0in" fo:padding-bottom="0in" fo:border="none" style:writing-mode="lr-tb"/>
    </style:style>
    <style:style style:name="Table1.E3" style:family="table-cell">
      <style:table-cell-properties fo:padding-left="0.075in" fo:padding-right="0.075in" fo:padding-top="0in" fo:padding-bottom="0in" fo:border="none" style:writing-mode="lr-tb"/>
    </style:style>
    <style:style style:name="Table1.A4" style:family="table-cell">
      <style:table-cell-properties fo:padding-left="0.075in" fo:padding-right="0.075in" fo:padding-top="0in" fo:padding-bottom="0in" fo:border="none" style:writing-mode="lr-tb"/>
    </style:style>
    <style:style style:name="Table1.B4" style:family="table-cell">
      <style:table-cell-properties fo:padding-left="0.075in" fo:padding-right="0.075in" fo:padding-top="0in" fo:padding-bottom="0in" fo:border="none" style:writing-mode="lr-tb"/>
    </style:style>
    <style:style style:name="Table1.C4" style:family="table-cell">
      <style:table-cell-properties fo:padding-left="0.075in" fo:padding-right="0.075in" fo:padding-top="0in" fo:padding-bottom="0in" fo:border="none" style:writing-mode="lr-tb"/>
    </style:style>
    <style:style style:name="Table1.D4" style:family="table-cell">
      <style:table-cell-properties fo:padding-left="0.075in" fo:padding-right="0.075in" fo:padding-top="0in" fo:padding-bottom="0in" fo:border="none" style:writing-mode="lr-tb"/>
    </style:style>
    <style:style style:name="Table1.E4" style:family="table-cell">
      <style:table-cell-properties fo:padding-left="0.075in" fo:padding-right="0.075in" fo:padding-top="0in" fo:padding-bottom="0in" fo:border="none" style:writing-mode="lr-tb"/>
    </style:style>
    <style:style style:name="Table1.A5" style:family="table-cell">
      <style:table-cell-properties fo:padding-left="0.075in" fo:padding-right="0.075in" fo:padding-top="0in" fo:padding-bottom="0in" fo:border="none" style:writing-mode="lr-tb"/>
    </style:style>
    <style:style style:name="Table1.B5" style:family="table-cell">
      <style:table-cell-properties fo:padding-left="0.075in" fo:padding-right="0.075in" fo:padding-top="0in" fo:padding-bottom="0in" fo:border="none" style:writing-mode="lr-tb"/>
    </style:style>
    <style:style style:name="Table1.C5" style:family="table-cell">
      <style:table-cell-properties fo:padding-left="0.075in" fo:padding-right="0.075in" fo:padding-top="0in" fo:padding-bottom="0in" fo:border="none" style:writing-mode="lr-tb"/>
    </style:style>
    <style:style style:name="Table1.D5" style:family="table-cell">
      <style:table-cell-properties fo:padding-left="0.075in" fo:padding-right="0.075in" fo:padding-top="0in" fo:padding-bottom="0in" fo:border="none" style:writing-mode="lr-tb"/>
    </style:style>
    <style:style style:name="Table1.E5" style:family="table-cell">
      <style:table-cell-properties fo:padding-left="0.075in" fo:padding-right="0.075in" fo:padding-top="0in" fo:padding-bottom="0in" fo:border="none" style:writing-mode="lr-tb"/>
    </style:style>
    <style:style style:name="Table1.A6" style:family="table-cell">
      <style:table-cell-properties fo:padding-left="0.075in" fo:padding-right="0.075in" fo:padding-top="0in" fo:padding-bottom="0in" fo:border="none" style:writing-mode="lr-tb"/>
    </style:style>
    <style:style style:name="Table1.B6" style:family="table-cell">
      <style:table-cell-properties fo:padding-left="0.075in" fo:padding-right="0.075in" fo:padding-top="0in" fo:padding-bottom="0in" fo:border="none" style:writing-mode="lr-tb"/>
    </style:style>
    <style:style style:name="Table1.C6" style:family="table-cell">
      <style:table-cell-properties fo:padding-left="0.075in" fo:padding-right="0.075in" fo:padding-top="0in" fo:padding-bottom="0in" fo:border="none" style:writing-mode="lr-tb"/>
    </style:style>
    <style:style style:name="Table1.D6" style:family="table-cell">
      <style:table-cell-properties fo:padding-left="0.075in" fo:padding-right="0.075in" fo:padding-top="0in" fo:padding-bottom="0in" fo:border="none" style:writing-mode="lr-tb"/>
    </style:style>
    <style:style style:name="Table1.E6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-0.1972in" fo:text-align="center" style:justify-single-word="false" fo:orphans="0" fo:widows="0"/>
      <style:text-properties officeooo:paragraph-rsid="0019e9ca"/>
    </style:style>
    <style:style style:name="P2" style:family="paragraph" style:parent-style-name="Standard">
      <style:paragraph-properties fo:margin-left="-0.2957in" fo:text-align="center" style:justify-single-word="false" fo:orphans="0" fo:widows="0"/>
      <style:text-properties officeooo:paragraph-rsid="0019e9ca"/>
    </style:style>
    <style:style style:name="P3" style:family="paragraph" style:parent-style-name="Standard">
      <style:paragraph-properties fo:margin-top="0.0972in" fo:margin-bottom="0in" style:contextual-spacing="false" fo:text-align="center" style:justify-single-word="false" fo:orphans="0" fo:widows="0"/>
      <style:text-properties officeooo:paragraph-rsid="0019e9ca"/>
    </style:style>
    <style:style style:name="P4" style:family="paragraph" style:parent-style-name="Standard">
      <style:paragraph-properties fo:orphans="0" fo:widows="0"/>
      <style:text-properties officeooo:paragraph-rsid="0019e9ca"/>
    </style:style>
    <style:style style:name="P5" style:family="paragraph" style:parent-style-name="Standard">
      <style:paragraph-properties fo:margin-top="0.139in" fo:margin-bottom="0in" style:contextual-spacing="false" fo:line-height="150%" fo:orphans="0" fo:widows="0"/>
      <style:text-properties officeooo:paragraph-rsid="0019e9ca"/>
    </style:style>
    <style:style style:name="P6" style:family="paragraph" style:parent-style-name="Standard">
      <style:paragraph-properties fo:margin-top="0.0972in" fo:margin-bottom="0in" style:contextual-spacing="false" fo:text-align="center" style:justify-single-word="false" fo:orphans="0" fo:widows="0"/>
      <style:text-properties officeooo:rsid="0004aeb3" officeooo:paragraph-rsid="0019e9ca"/>
    </style:style>
    <style:style style:name="P7" style:family="paragraph" style:parent-style-name="Standard">
      <style:paragraph-properties fo:line-height="0.1252in" fo:text-align="center" style:justify-single-word="false" fo:orphans="0" fo:widows="0"/>
      <style:text-properties officeooo:paragraph-rsid="0019e9ca"/>
    </style:style>
    <style:style style:name="P8" style:family="paragraph" style:parent-style-name="Standard">
      <style:paragraph-properties fo:line-height="0.1252in" fo:orphans="0" fo:widows="0"/>
      <style:text-properties fo:font-size="11pt" officeooo:paragraph-rsid="0019e9ca" style:font-size-asian="11pt" style:font-size-complex="11pt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9e9ca"/>
    </style:style>
    <style:style style:name="P10" style:family="paragraph" style:parent-style-name="Text_20_body">
      <style:paragraph-properties fo:margin-top="0.2083in" fo:margin-bottom="0in" style:contextual-spacing="false"/>
      <style:text-properties officeooo:paragraph-rsid="0019e9ca"/>
    </style:style>
    <style:style style:name="P11" style:family="paragraph" style:parent-style-name="Text_20_body">
      <style:paragraph-properties fo:margin-top="0.2083in" fo:margin-bottom="0in" style:contextual-spacing="false" fo:text-align="center" style:justify-single-word="false"/>
      <style:text-properties officeooo:paragraph-rsid="0019e9ca"/>
    </style:style>
    <style:style style:name="P12" style:family="paragraph" style:parent-style-name="Title">
      <style:paragraph-properties fo:margin-top="0.5in" fo:margin-bottom="0.5in" style:contextual-spacing="false"/>
      <style:text-properties officeooo:paragraph-rsid="0019e9ca"/>
    </style:style>
    <style:style style:name="P13" style:family="paragraph" style:parent-style-name="Standard">
      <style:text-properties officeooo:paragraph-rsid="0019e9ca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officeooo:paragraph-rsid="0019e9ca"/>
    </style:style>
    <style:style style:name="P15" style:family="paragraph" style:parent-style-name="Standard">
      <style:paragraph-properties fo:margin-top="0.278in" fo:margin-bottom="0in" style:contextual-spacing="false" fo:line-height="150%" fo:orphans="0" fo:widows="0"/>
      <style:text-properties officeooo:paragraph-rsid="0019e9ca"/>
    </style:style>
    <style:style style:name="P16" style:family="paragraph" style:parent-style-name="Standard">
      <style:paragraph-properties fo:margin-left="-0.0752in" fo:margin-top="0.0972in" fo:margin-bottom="0in" style:contextual-spacing="false" fo:orphans="0" fo:widows="0"/>
      <style:text-properties officeooo:paragraph-rsid="0019e9ca"/>
    </style:style>
    <style:style style:name="P17" style:family="paragraph" style:parent-style-name="Standard">
      <style:paragraph-properties fo:line-height="0.1252in" fo:text-align="center" style:justify-single-word="false" fo:orphans="0" fo:widows="0"/>
      <style:text-properties fo:font-size="10pt" officeooo:paragraph-rsid="0019e9ca" style:font-size-asian="10pt" style:font-size-complex="10pt"/>
    </style:style>
    <style:style style:name="P18" style:family="paragraph" style:parent-style-name="Standard">
      <style:paragraph-properties fo:line-height="0.1252in" fo:text-align="justify" style:justify-single-word="false" fo:orphans="0" fo:widows="0"/>
      <style:text-properties officeooo:paragraph-rsid="0019e9ca"/>
    </style:style>
    <style:style style:name="P19" style:family="paragraph" style:parent-style-name="Standard">
      <style:paragraph-properties fo:text-align="center" style:justify-single-word="false" fo:orphans="0" fo:widows="0"/>
      <style:text-properties officeooo:paragraph-rsid="0019e9ca"/>
    </style:style>
    <style:style style:name="P20" style:family="paragraph" style:parent-style-name="Heading_20_2">
      <style:text-properties officeooo:paragraph-rsid="0019e9ca"/>
    </style:style>
    <style:style style:name="P21" style:family="paragraph" style:parent-style-name="Compact" style:list-style-name="WWNum1001"/>
    <style:style style:name="P22" style:family="paragraph" style:parent-style-name="Compact" style:list-style-name="WWNum1002"/>
    <style:style style:name="P23" style:family="paragraph" style:parent-style-name="Compact">
      <style:paragraph-properties fo:text-align="left" style:justify-single-word="false" fo:orphans="2" fo:widows="2"/>
      <style:text-properties style:font-name="Aptos" fo:font-size="12pt" fo:language="ru" fo:country="RU" style:letter-kerning="false" style:font-name-asian="F" style:font-size-asian="12pt" style:language-asian="zh" style:country-asian="CN" style:font-name-complex="F" style:font-size-complex="12pt" style:language-complex="ar" style:country-complex="SA"/>
    </style:style>
    <style:style style:name="P24" style:family="paragraph" style:parent-style-name="Compact">
      <style:paragraph-properties fo:text-align="right" style:justify-single-word="false" fo:orphans="2" fo:widows="2"/>
      <style:text-properties style:font-name="Aptos" fo:font-size="12pt" fo:language="ru" fo:country="RU" style:letter-kerning="false" style:font-name-asian="F" style:font-size-asian="12pt" style:language-asian="zh" style:country-asian="CN" style:font-name-complex="F" style:font-size-complex="12pt" style:language-complex="ar" style:country-complex="SA"/>
    </style:style>
    <style:style style:name="P25" style:family="paragraph" style:parent-style-name="Compact" style:list-style-name="WWNum1003"/>
    <style:style style:name="P26" style:family="paragraph" style:parent-style-name="Compact" style:list-style-name="WWNum1004"/>
    <style:style style:name="P27" style:family="paragraph" style:parent-style-name="Compact" style:list-style-name="WWNum1005"/>
    <style:style style:name="T1" style:family="text">
      <style:text-properties style:rfc-language-tag-asian="x-none"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19e9ca"/>
    </style:style>
    <style:style style:name="T7" style:family="text">
      <style:text-properties fo:font-size="16pt" fo:font-weight="normal" style:font-size-asian="16pt" style:font-weight-asian="normal" style:font-size-complex="16pt"/>
    </style:style>
    <style:style style:name="T8" style:family="text">
      <style:text-properties fo:font-size="16pt" fo:font-weight="normal" officeooo:rsid="0019e9ca" style:font-size-asian="16pt" style:font-weight-asian="normal" style:font-size-complex="16pt"/>
    </style:style>
    <style:style style:name="T9" style:family="text">
      <style:text-properties officeooo:rsid="0004aeb3"/>
    </style:style>
    <style:style style:name="T10" style:family="text">
      <style:text-properties fo:font-size="11pt" officeooo:rsid="0004aeb3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 высшего образования</text:p>
      <text:p text:style-name="P1" loext:marker-style-name="T2"><text:span text:style-name="T3"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4">КАФЕДРА ВЫЧИСЛИТЕЛЬНЫХ СИСТЕМ И СЕТЕЙ</text:span></text:p>
            <text:p text:style-name="P3"/>
          </table:table-cell>
        </table:table-row>
      </table:table>
      <text:p text:style-name="P4"/>
      <text:p text:style-name="P4">ОЦЕНКА<text:tab/><text:tab/><text:tab/><text:tab/><text:tab/></text:p>
      <text:p text:style-name="P5">ПРЕПОДАВАТЕЛЬ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Старший преподаватель</text:p>
          </table:table-cell>
          <table:table-cell table:style-name="Table3.B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"/>
          </table:table-cell>
          <table:table-cell table:style-name="Table3.A1" office:value-type="string">
            <text:p text:style-name="P6">Д.А.Булгаков</text:p>
          </table:table-cell>
        </table:table-row>
        <table:table-row table:style-name="Table3.1">
          <table:table-cell table:style-name="Table3.B1" office:value-type="string">
            <text:p text:style-name="P7" loext:marker-style-name="T4"><text:span text:style-name="T4">должность, уч. степень, звание</text:span></text:p>
          </table:table-cell>
          <table:table-cell table:style-name="Table3.B1" office:value-type="string">
            <text:p text:style-name="P8" loext:marker-style-name="T5"/>
          </table:table-cell>
          <table:table-cell table:style-name="Table3.B1" office:value-type="string">
            <text:p text:style-name="P7" loext:marker-style-name="T4"><text:span text:style-name="T4">подпись, дата</text:span></text:p>
          </table:table-cell>
          <table:table-cell table:style-name="Table3.B1" office:value-type="string">
            <text:p text:style-name="P8" loext:marker-style-name="T5"/>
          </table:table-cell>
          <table:table-cell table:style-name="Table3.B1" office:value-type="string">
            <text:p text:style-name="P7" loext:marker-style-name="T4"><text:span text:style-name="T4">инициалы, фамилия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P11">ОТЧЕТ О ЛАБОРАТОРНОЙ РАБОТЕ №<text:span text:style-name="T6">3</text:span></text:p>
          </table:table-cell>
        </table:table-row>
        <table:table-row table:style-name="Table4.1">
          <table:table-cell table:style-name="Table4.A2" office:value-type="string">
            <text:p text:style-name="P12" loext:marker-style-name="T7"><text:span text:style-name="T7">Лабораторная работа: </text:span><text:span text:style-name="T8">управление вращением робота</text:span></text:p>
            <text:p text:style-name="P13"/>
          </table:table-cell>
        </table:table-row>
        <table:table-row table:style-name="Table4.3">
          <table:table-cell table:style-name="Table4.A3" office:value-type="string">
            <text:p text:style-name="P14">по дисциплине: <text:span text:style-name="T9">Управление виртуальным двойником</text:span></text:p>
          </table:table-cell>
        </table:table-row>
      </table:table>
      <text:p text:style-name="P15">РАБОТУ ВЫПОЛНИЛ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6">СТУДЕНТ гр. №</text:p>
          </table:table-cell>
          <table:table-cell table:style-name="Table5.B1" office:value-type="string">
            <text:p text:style-name="P3">4241в</text:p>
          </table:table-cell>
          <table:table-cell table:style-name="Table5.A1" office:value-type="string">
            <text:p text:style-name="P3"/>
          </table:table-cell>
          <table:table-cell table:style-name="Table5.D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D1" office:value-type="string">
            <text:p text:style-name="P6">А.А.Хусаинов</text:p>
          </table:table-cell>
        </table:table-row>
        <table:table-row table:style-name="Table5.2">
          <table:table-cell table:style-name="Table5.A1" office:value-type="string">
            <text:p text:style-name="P17" loext:marker-style-name="T4"/>
          </table:table-cell>
          <table:table-cell table:style-name="Table5.B2" office:value-type="string">
            <text:p text:style-name="P7" loext:marker-style-name="T5"><text:span text:style-name="T4">номер группы</text:span></text:p>
          </table:table-cell>
          <table:table-cell table:style-name="Table5.A1" office:value-type="string">
            <text:p text:style-name="P8" loext:marker-style-name="T5"/>
          </table:table-cell>
          <table:table-cell table:style-name="Table5.D2" office:value-type="string">
            <text:p text:style-name="P7" loext:marker-style-name="T4"><text:span text:style-name="T4">подпись, дата</text:span></text:p>
          </table:table-cell>
          <table:table-cell table:style-name="Table5.A1" office:value-type="string">
            <text:p text:style-name="P8" loext:marker-style-name="T5"/>
          </table:table-cell>
          <table:table-cell table:style-name="Table5.A1" office:value-type="string">
            <text:p text:style-name="P7" loext:marker-style-name="T4"><text:span text:style-name="T4">инициалы, фамилия</text:span></text:p>
          </table:table-cell>
        </table:table-row>
        <table:table-row table:style-name="Table5.3">
          <table:table-cell table:style-name="Table5.A1" office:value-type="string">
            <text:p text:style-name="P18" loext:marker-style-name="T5"><text:span text:style-name="T4">Студенческий билет №</text:span></text:p>
          </table:table-cell>
          <table:table-cell table:style-name="Table5.D1" table:number-columns-spanned="2" office:value-type="string">
            <text:p text:style-name="P7" loext:marker-style-name="T5"><text:span text:style-name="T5">2022/27</text:span><text:span text:style-name="T10">8</text:span><text:span text:style-name="T5">3</text:span></text:p>
          </table:table-cell>
          <table:covered-table-cell/>
          <table:table-cell table:style-name="Table5.A1" office:value-type="string">
            <text:p text:style-name="P17" loext:marker-style-name="T4"/>
          </table:table-cell>
          <table:table-cell table:style-name="Table5.A1" office:value-type="string">
            <text:p text:style-name="P8" loext:marker-style-name="T5"/>
          </table:table-cell>
          <table:table-cell table:style-name="Table5.A1" office:value-type="string">
            <text:p text:style-name="P17" loext:marker-style-name="T4"/>
          </table:table-cell>
        </table:table-row>
      </table:table>
      <text:p text:style-name="P19">Санкт-Петербург 2026</text:p>
      <text:h text:style-name="P20" text:outline-level="2"><text:bookmark-start text:name="X8f1b8a9c9155c4d1c35657657d0596afee04616"/><text:bookmark-start text:name="цель-работы"/><text:soft-page-break/>Цель работы</text:h>
      <text:p text:style-name="First_20_Paragraph">Цель работы — реализовать управление пятиосевой роборукой из веб-интерфейса через COM-порт, синхронизировать физическое устройство с цифровым двойником на Three.js и организовать безопасную авто-отправку изменений углов без перегрузки Serial-канала.</text:p>
      <text:p text:style-name="Text_20_body">В ходе работы решались следующие задачи:</text:p>
      <text:list xml:id="list3421574583" text:style-name="WWNum1001">
        <text:list-item>
          <text:p text:style-name="P21">описать карту сервоприводов и диапазонов;</text:p>
        </text:list-item>
        <text:list-item>
          <text:p text:style-name="P21">реализовать единый serial-протокол управления;</text:p>
        </text:list-item>
        <text:list-item>
          <text:p text:style-name="P21">связать слайдеры веб-интерфейса с 3D-моделью;</text:p>
        </text:list-item>
        <text:list-item>
          <text:p text:style-name="P21">передавать команды в Arduino через Web Serial API;</text:p>
        </text:list-item>
        <text:list-item>
          <text:p text:style-name="P21">реализовать throttled debounce для авто-отправки изменений;</text:p>
        </text:list-item>
        <text:list-item>
          <text:p text:style-name="P21">проверить работу протокола на Arduino Uno и совместимость с Arduino Nano.<text:bookmark-end text:name="цель-работы"/></text:p>
        </text:list-item>
      </text:list>
      <text:h text:style-name="Heading_20_2" text:outline-level="2"><text:bookmark-start text:name="аппаратная-и-программная-часть"/>Аппаратная и программная часть</text:h>
      <text:p text:style-name="First_20_Paragraph">Реальная установка использует Arduino Nano. Для промежуточной проверки применялась Arduino Uno без сервоприводов и экрана. Это позволило проверить Serial-протокол без риска для механики роборуки.</text:p>
      <text:p text:style-name="Text_20_body">Используемые компоненты:</text:p>
      <text:list xml:id="list134348244212596" text:continue-list="list3421574583" text:style-name="WWNum1002">
        <text:list-item>
          <text:p text:style-name="P22">Arduino Nano / Arduino Uno;</text:p>
        </text:list-item>
        <text:list-item>
          <text:p text:style-name="P22">5 сервоприводов роборуки;</text:p>
        </text:list-item>
        <text:list-item>
          <text:p text:style-name="P22">веб-интерфейс на TypeScript;</text:p>
        </text:list-item>
        <text:list-item>
          <text:p text:style-name="P22">Web Serial API;</text:p>
        </text:list-item>
        <text:list-item>
          <text:p text:style-name="P22">Three.js-модель <text:span text:style-name="Verbatim_20_Char">public/roboarm.glb</text:span>;</text:p>
        </text:list-item>
        <text:list-item>
          <text:p text:style-name="P22">Arduino-библиотека <text:span text:style-name="Verbatim_20_Char">Servo</text:span>.<text:bookmark-end text:name="аппаратная-и-программная-часть"/></text:p>
        </text:list-item>
      </text:list>
      <text:h text:style-name="Heading_20_2" text:outline-level="2"><text:bookmark-start text:name="карта-сервоприводов"/>Карта сервоприводов</text:h>
      <text:p text:style-name="First_20_Paragraph">В проекте используется 5 каналов управления. Каждый канал имеет буквенный идентификатор в serial-протоколе, физический пин Arduino и допустимый диапазон.</text:p>
      <table:table table:name="Table1" table:style-name="Table1">
        <table:table-column table:style-name="Table1.A" table:number-columns-repeated="5"/>
        <table:table-header-rows>
          <table:table-row table:style-name="Table1.1">
            <table:table-cell table:style-name="Table1.A1" office:value-type="string">
              <text:p text:style-name="P23">Канал</text:p>
            </table:table-cell>
            <table:table-cell table:style-name="Table1.A1" office:value-type="string">
              <text:p text:style-name="P23">Буква протокола</text:p>
            </table:table-cell>
            <table:table-cell table:style-name="Table1.A1" office:value-type="string">
              <text:p text:style-name="P24">Пин Arduino</text:p>
            </table:table-cell>
            <table:table-cell table:style-name="Table1.A1" office:value-type="string">
              <text:p text:style-name="P23">Узел робота</text:p>
            </table:table-cell>
            <table:table-cell table:style-name="Table1.A1" office:value-type="string">
              <text:p text:style-name="P24">Диапазон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3">S1</text:p>
          </table:table-cell>
          <table:table-cell table:style-name="Table1.B2" office:value-type="string">
            <text:p text:style-name="P23">A</text:p>
          </table:table-cell>
          <table:table-cell table:style-name="Table1.C2" office:value-type="string">
            <text:p text:style-name="P24">D9</text:p>
          </table:table-cell>
          <table:table-cell table:style-name="Table1.D2" office:value-type="string">
            <text:p text:style-name="P23">База</text:p>
          </table:table-cell>
          <table:table-cell table:style-name="Table1.E2" office:value-type="string">
            <text:p text:style-name="P24">0..180</text:p>
          </table:table-cell>
        </table:table-row>
        <table:table-row table:style-name="Table1.1">
          <table:table-cell table:style-name="Table1.A3" office:value-type="string">
            <text:p text:style-name="P23">S2</text:p>
          </table:table-cell>
          <table:table-cell table:style-name="Table1.B3" office:value-type="string">
            <text:p text:style-name="P23">B</text:p>
          </table:table-cell>
          <table:table-cell table:style-name="Table1.C3" office:value-type="string">
            <text:p text:style-name="P24">D6</text:p>
          </table:table-cell>
          <table:table-cell table:style-name="Table1.D3" office:value-type="string">
            <text:p text:style-name="P23">Плечо</text:p>
          </table:table-cell>
          <table:table-cell table:style-name="Table1.E3" office:value-type="string">
            <text:p text:style-name="P24">0..180</text:p>
          </table:table-cell>
        </table:table-row>
        <table:table-row table:style-name="Table1.1">
          <table:table-cell table:style-name="Table1.A4" office:value-type="string">
            <text:p text:style-name="P23">S3</text:p>
          </table:table-cell>
          <table:table-cell table:style-name="Table1.B4" office:value-type="string">
            <text:p text:style-name="P23">C</text:p>
          </table:table-cell>
          <table:table-cell table:style-name="Table1.C4" office:value-type="string">
            <text:p text:style-name="P24">D5</text:p>
          </table:table-cell>
          <table:table-cell table:style-name="Table1.D4" office:value-type="string">
            <text:p text:style-name="P23">Локоть</text:p>
          </table:table-cell>
          <table:table-cell table:style-name="Table1.E4" office:value-type="string">
            <text:p text:style-name="P24">0..180</text:p>
          </table:table-cell>
        </table:table-row>
        <table:table-row table:style-name="Table1.1">
          <table:table-cell table:style-name="Table1.A5" office:value-type="string">
            <text:p text:style-name="P23">S4</text:p>
          </table:table-cell>
          <table:table-cell table:style-name="Table1.B5" office:value-type="string">
            <text:p text:style-name="P23">D</text:p>
          </table:table-cell>
          <table:table-cell table:style-name="Table1.C5" office:value-type="string">
            <text:p text:style-name="P24">D3</text:p>
          </table:table-cell>
          <table:table-cell table:style-name="Table1.D5" office:value-type="string">
            <text:p text:style-name="P23">Запястье</text:p>
          </table:table-cell>
          <table:table-cell table:style-name="Table1.E5" office:value-type="string">
            <text:p text:style-name="P24">0..180</text:p>
          </table:table-cell>
        </table:table-row>
        <table:table-row table:style-name="Table1.1">
          <table:table-cell table:style-name="Table1.A6" office:value-type="string">
            <text:p text:style-name="P23">S5</text:p>
          </table:table-cell>
          <table:table-cell table:style-name="Table1.B6" office:value-type="string">
            <text:p text:style-name="P23">E</text:p>
          </table:table-cell>
          <table:table-cell table:style-name="Table1.C6" office:value-type="string">
            <text:p text:style-name="P24">D11</text:p>
          </table:table-cell>
          <table:table-cell table:style-name="Table1.D6" office:value-type="string">
            <text:p text:style-name="P23">Захват</text:p>
          </table:table-cell>
          <table:table-cell table:style-name="Table1.E6" office:value-type="string">
            <text:p text:style-name="P24">35..90</text:p>
          </table:table-cell>
        </table:table-row>
      </table:table>
      <text:p text:style-name="Text_20_body">Фрагмент конфигурации в веб-интерфейсе:</text:p>
      <text:p text:style-name="Source_20_Code"><text:span text:style-name="KeywordTok">const</text:span><text:span text:style-name="NormalTok"> SERVO_CONFIG </text:span><text:span text:style-name="OperatorTok">=</text:span><text:span text:style-name="NormalTok"> [</text:span><text:line-break/><text:span text:style-name="NormalTok"> <text:s/>{ id</text:span><text:span text:style-name="OperatorTok">:</text:span><text:span text:style-name="NormalTok"> </text:span><text:span text:style-name="StringTok">'A'</text:span><text:span text:style-name="OperatorTok">,</text:span><text:span text:style-name="NormalTok"> min</text:span><text:span text:style-name="OperatorTok">:</text:span><text:span text:style-name="NormalTok"> </text:span><text:span text:style-name="DecValTok">0</text:span><text:span text:style-name="OperatorTok">,</text:span><text:span text:style-name="NormalTok"> max</text:span><text:span text:style-name="OperatorTok">:</text:span><text:span text:style-name="NormalTok"> </text:span><text:span text:style-name="DecValTok">180</text:span><text:span text:style-name="OperatorTok">,</text:span><text:span text:style-name="NormalTok"> initial</text:span><text:span text:style-name="OperatorTok">:</text:span><text:span text:style-name="NormalTok"> </text:span><text:span text:style-name="DecValTok">90</text:span><text:span text:style-name="NormalTok"> }</text:span><text:span text:style-name="OperatorTok">,</text:span><text:line-break/><text:soft-page-break/><text:span text:style-name="NormalTok"> <text:s/>{ id</text:span><text:span text:style-name="OperatorTok">:</text:span><text:span text:style-name="NormalTok"> </text:span><text:span text:style-name="StringTok">'B'</text:span><text:span text:style-name="OperatorTok">,</text:span><text:span text:style-name="NormalTok"> min</text:span><text:span text:style-name="OperatorTok">:</text:span><text:span text:style-name="NormalTok"> </text:span><text:span text:style-name="DecValTok">0</text:span><text:span text:style-name="OperatorTok">,</text:span><text:span text:style-name="NormalTok"> max</text:span><text:span text:style-name="OperatorTok">:</text:span><text:span text:style-name="NormalTok"> </text:span><text:span text:style-name="DecValTok">180</text:span><text:span text:style-name="OperatorTok">,</text:span><text:span text:style-name="NormalTok"> initial</text:span><text:span text:style-name="OperatorTok">:</text:span><text:span text:style-name="NormalTok"> </text:span><text:span text:style-name="DecValTok">90</text:span><text:span text:style-name="NormalTok"> }</text:span><text:span text:style-name="OperatorTok">,</text:span><text:line-break/><text:span text:style-name="NormalTok"> <text:s/>{ id</text:span><text:span text:style-name="OperatorTok">:</text:span><text:span text:style-name="NormalTok"> </text:span><text:span text:style-name="StringTok">'C'</text:span><text:span text:style-name="OperatorTok">,</text:span><text:span text:style-name="NormalTok"> min</text:span><text:span text:style-name="OperatorTok">:</text:span><text:span text:style-name="NormalTok"> </text:span><text:span text:style-name="DecValTok">0</text:span><text:span text:style-name="OperatorTok">,</text:span><text:span text:style-name="NormalTok"> max</text:span><text:span text:style-name="OperatorTok">:</text:span><text:span text:style-name="NormalTok"> </text:span><text:span text:style-name="DecValTok">180</text:span><text:span text:style-name="OperatorTok">,</text:span><text:span text:style-name="NormalTok"> initial</text:span><text:span text:style-name="OperatorTok">:</text:span><text:span text:style-name="NormalTok"> </text:span><text:span text:style-name="DecValTok">90</text:span><text:span text:style-name="NormalTok"> }</text:span><text:span text:style-name="OperatorTok">,</text:span><text:line-break/><text:span text:style-name="NormalTok"> <text:s/>{ id</text:span><text:span text:style-name="OperatorTok">:</text:span><text:span text:style-name="NormalTok"> </text:span><text:span text:style-name="StringTok">'D'</text:span><text:span text:style-name="OperatorTok">,</text:span><text:span text:style-name="NormalTok"> min</text:span><text:span text:style-name="OperatorTok">:</text:span><text:span text:style-name="NormalTok"> </text:span><text:span text:style-name="DecValTok">0</text:span><text:span text:style-name="OperatorTok">,</text:span><text:span text:style-name="NormalTok"> max</text:span><text:span text:style-name="OperatorTok">:</text:span><text:span text:style-name="NormalTok"> </text:span><text:span text:style-name="DecValTok">180</text:span><text:span text:style-name="OperatorTok">,</text:span><text:span text:style-name="NormalTok"> initial</text:span><text:span text:style-name="OperatorTok">:</text:span><text:span text:style-name="NormalTok"> </text:span><text:span text:style-name="DecValTok">90</text:span><text:span text:style-name="NormalTok"> }</text:span><text:span text:style-name="OperatorTok">,</text:span><text:line-break/><text:span text:style-name="NormalTok"> <text:s/>{ id</text:span><text:span text:style-name="OperatorTok">:</text:span><text:span text:style-name="NormalTok"> </text:span><text:span text:style-name="StringTok">'E'</text:span><text:span text:style-name="OperatorTok">,</text:span><text:span text:style-name="NormalTok"> min</text:span><text:span text:style-name="OperatorTok">:</text:span><text:span text:style-name="NormalTok"> </text:span><text:span text:style-name="DecValTok">35</text:span><text:span text:style-name="OperatorTok">,</text:span><text:span text:style-name="NormalTok"> max</text:span><text:span text:style-name="OperatorTok">:</text:span><text:span text:style-name="NormalTok"> </text:span><text:span text:style-name="DecValTok">90</text:span><text:span text:style-name="OperatorTok">,</text:span><text:span text:style-name="NormalTok"> initial</text:span><text:span text:style-name="OperatorTok">:</text:span><text:span text:style-name="NormalTok"> </text:span><text:span text:style-name="DecValTok">90</text:span><text:span text:style-name="NormalTok"> }</text:span><text:span text:style-name="OperatorTok">,</text:span><text:line-break/><text:span text:style-name="NormalTok">] </text:span><text:span text:style-name="ImportTok">as</text:span><text:span text:style-name="NormalTok"> </text:span><text:span text:style-name="KeywordTok">const</text:span></text:p>
      <text:p text:style-name="First_20_Paragraph">Та же карта задана в Arduino-прошивке:</text:p>
      <text:p text:style-name="Source_20_Code"><text:span text:style-name="AttributeTok">const</text:span><text:span text:style-name="NormalTok"> byte SERVO_COUNT </text:span><text:span text:style-name="OperatorTok">=</text:span><text:span text:style-name="NormalTok"> </text:span><text:span text:style-name="DecValTok">5</text:span><text:span text:style-name="OperatorTok">;</text:span><text:line-break/><text:span text:style-name="AttributeTok">const</text:span><text:span text:style-name="NormalTok"> byte servoPins</text:span><text:span text:style-name="OperatorTok">[</text:span><text:span text:style-name="NormalTok">SERVO_COUNT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9</text:span><text:span text:style-name="OperatorTok">,</text:span><text:span text:style-name="NormalTok"> </text:span><text:span text:style-name="DecValTok">6</text:span><text:span text:style-name="OperatorTok">,</text:span><text:span text:style-name="NormalTok"> </text:span><text:span text:style-name="DecValTok">5</text:span><text:span text:style-name="OperatorTok">,</text:span><text:span text:style-name="NormalTok"> </text:span><text:span text:style-name="DecValTok">3</text:span><text:span text:style-name="OperatorTok">,</text:span><text:span text:style-name="NormalTok"> </text:span><text:span text:style-name="DecValTok">11</text:span><text:span text:style-name="OperatorTok">};</text:span><text:line-break/><text:span text:style-name="AttributeTok">const</text:span><text:span text:style-name="NormalTok"> </text:span><text:span text:style-name="DataTypeTok">char</text:span><text:span text:style-name="NormalTok"> servoIds</text:span><text:span text:style-name="OperatorTok">[</text:span><text:span text:style-name="NormalTok">SERVO_COUNT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CharTok">'A'</text:span><text:span text:style-name="OperatorTok">,</text:span><text:span text:style-name="NormalTok"> </text:span><text:span text:style-name="CharTok">'B'</text:span><text:span text:style-name="OperatorTok">,</text:span><text:span text:style-name="NormalTok"> </text:span><text:span text:style-name="CharTok">'C'</text:span><text:span text:style-name="OperatorTok">,</text:span><text:span text:style-name="NormalTok"> </text:span><text:span text:style-name="CharTok">'D'</text:span><text:span text:style-name="OperatorTok">,</text:span><text:span text:style-name="NormalTok"> </text:span><text:span text:style-name="CharTok">'E'</text:span><text:span text:style-name="OperatorTok">};</text:span><text:line-break/><text:span text:style-name="AttributeTok">const</text:span><text:span text:style-name="NormalTok"> </text:span><text:span text:style-name="DataTypeTok">int</text:span><text:span text:style-name="NormalTok"> servoMin</text:span><text:span text:style-name="OperatorTok">[</text:span><text:span text:style-name="NormalTok">SERVO_COUNT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0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DecValTok">35</text:span><text:span text:style-name="OperatorTok">};</text:span><text:line-break/><text:span text:style-name="AttributeTok">const</text:span><text:span text:style-name="NormalTok"> </text:span><text:span text:style-name="DataTypeTok">int</text:span><text:span text:style-name="NormalTok"> servoMax</text:span><text:span text:style-name="OperatorTok">[</text:span><text:span text:style-name="NormalTok">SERVO_COUNT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180</text:span><text:span text:style-name="OperatorTok">,</text:span><text:span text:style-name="NormalTok"> </text:span><text:span text:style-name="DecValTok">180</text:span><text:span text:style-name="OperatorTok">,</text:span><text:span text:style-name="NormalTok"> </text:span><text:span text:style-name="DecValTok">180</text:span><text:span text:style-name="OperatorTok">,</text:span><text:span text:style-name="NormalTok"> </text:span><text:span text:style-name="DecValTok">180</text:span><text:span text:style-name="OperatorTok">,</text:span><text:span text:style-name="NormalTok"> </text:span><text:span text:style-name="DecValTok">90</text:span><text:span text:style-name="OperatorTok">};</text:span><text:line-break/><text:span text:style-name="DataTypeTok">int</text:span><text:span text:style-name="NormalTok"> servoAngles</text:span><text:span text:style-name="OperatorTok">[</text:span><text:span text:style-name="NormalTok">SERVO_COUNT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90</text:span><text:span text:style-name="OperatorTok">,</text:span><text:span text:style-name="NormalTok"> </text:span><text:span text:style-name="DecValTok">90</text:span><text:span text:style-name="OperatorTok">,</text:span><text:span text:style-name="NormalTok"> </text:span><text:span text:style-name="DecValTok">90</text:span><text:span text:style-name="OperatorTok">,</text:span><text:span text:style-name="NormalTok"> </text:span><text:span text:style-name="DecValTok">90</text:span><text:span text:style-name="OperatorTok">,</text:span><text:span text:style-name="NormalTok"> </text:span><text:span text:style-name="DecValTok">90</text:span><text:span text:style-name="OperatorTok">};</text:span><text:line-break/><text:span text:style-name="NormalTok">Servo servos</text:span><text:span text:style-name="OperatorTok">[</text:span><text:span text:style-name="NormalTok">SERVO_COUNT</text:span><text:span text:style-name="OperatorTok">];</text:span></text:p>
      <text:p text:style-name="First_20_Paragraph">Диапазон захвата ограничен значениями 35..90, так как механика gripper имеет меньший рабочий ход, чем остальные оси.<text:bookmark-end text:name="карта-сервоприводов"/></text:p>
      <text:h text:style-name="Heading_20_2" text:outline-level="2"><text:bookmark-start text:name="протокол-управления-через-com-порт"/>Протокол управления через COM-порт</text:h>
      <text:p text:style-name="First_20_Paragraph">Управление роботом выполняется текстовым пакетом:</text:p>
      <text:p text:style-name="Source_20_Code"><text:span text:style-name="Verbatim_20_Char">A{angle}B{angle}C{angle}D{angle}E{angle};</text:span></text:p>
      <text:p text:style-name="First_20_Paragraph">Пример:</text:p>
      <text:p text:style-name="Source_20_Code"><text:span text:style-name="Verbatim_20_Char">A100B120C60D90E90;</text:span></text:p>
      <text:p text:style-name="First_20_Paragraph">В этом пакете:</text:p>
      <text:list xml:id="list134349918711253" text:continue-list="list134348244212596" text:style-name="WWNum1003">
        <text:list-item>
          <text:p text:style-name="P25"><text:span text:style-name="Verbatim_20_Char">A100</text:span> — база устанавливается на 100°;</text:p>
        </text:list-item>
        <text:list-item>
          <text:p text:style-name="P25"><text:span text:style-name="Verbatim_20_Char">B120</text:span> — плечо устанавливается на 120°;</text:p>
        </text:list-item>
        <text:list-item>
          <text:p text:style-name="P25"><text:span text:style-name="Verbatim_20_Char">C60</text:span> — локоть устанавливается на 60°;</text:p>
        </text:list-item>
        <text:list-item>
          <text:p text:style-name="P25"><text:span text:style-name="Verbatim_20_Char">D90</text:span> — запястье устанавливается на 90°;</text:p>
        </text:list-item>
        <text:list-item>
          <text:p text:style-name="P25"><text:span text:style-name="Verbatim_20_Char">E90</text:span> — захват устанавливается на 90°.</text:p>
        </text:list-item>
      </text:list>
      <text:p text:style-name="First_20_Paragraph">Команда завершается символом <text:span text:style-name="Verbatim_20_Char">;</text:span>, по которому Arduino понимает, что пакет получен полностью.</text:p>
      <text:p text:style-name="Text_20_body">При успешной обработке Arduino отвечает:</text:p>
      <text:p text:style-name="Source_20_Code"><text:span text:style-name="Verbatim_20_Char">OK SERVOS A100B120C60D90E90;</text:span></text:p>
      <text:p text:style-name="First_20_Paragraph">Если пакет неполный или неверный, возвращается ошибка:</text:p>
      <text:p text:style-name="Source_20_Code"><text:span text:style-name="Verbatim_20_Char">ERR invalid servo packet: A10B20</text:span><text:bookmark-end text:name="протокол-управления-через-com-порт"/></text:p>
      <text:h text:style-name="Heading_20_2" text:outline-level="2"><text:bookmark-start text:name="поток-данных-в-веб-приложении"/>Поток данных в веб-приложении</text:h>
      <text:p text:style-name="First_20_Paragraph">Веб-приложение хранит текущие углы в массиве <text:span text:style-name="Verbatim_20_Char">values</text:span>. Слайдеры, hand tracking и другие источники управления должны обновлять именно этот массив.</text:p>
      <text:p text:style-name="Text_20_body"><text:soft-page-break/>При изменении слайдера выполняется несколько действий:</text:p>
      <text:list text:style-name="WWNum1004">
        <text:list-item text:start-value="1">
          <text:p text:style-name="P26">Обновляется значение в <text:span text:style-name="Verbatim_20_Char">values</text:span>.</text:p>
        </text:list-item>
        <text:list-item>
          <text:p text:style-name="P26">Обновляется числовая подпись около слайдера.</text:p>
        </text:list-item>
        <text:list-item>
          <text:p text:style-name="P26">Обновляется preview serial-пакета.</text:p>
        </text:list-item>
        <text:list-item>
          <text:p text:style-name="P26">Вызывается <text:span text:style-name="Verbatim_20_Char">setServoAngle(...)</text:span> для 3D-модели.</text:p>
        </text:list-item>
        <text:list-item>
          <text:p text:style-name="P26">Если включена авто-отправка, планируется отправка пакета в Arduino.</text:p>
        </text:list-item>
      </text:list>
      <text:p text:style-name="First_20_Paragraph">Фрагмент обработчика слайдера:</text:p>
      <text:p text:style-name="Source_20_Code"><text:span text:style-name="NormalTok">slider</text:span><text:span text:style-name="OperatorTok">.</text:span><text:span text:style-name="FunctionTok">addEventListener</text:span><text:span text:style-name="NormalTok">(</text:span><text:span text:style-name="StringTok">'input'</text:span><text:span text:style-name="OperatorTok">,</text:span><text:span text:style-name="NormalTok"> () </text:span><text:span text:style-name="KeywordTok">=&gt;</text:span><text:span text:style-name="NormalTok"> {</text:span><text:line-break/><text:span text:style-name="NormalTok"> <text:s/>values[index] </text:span><text:span text:style-name="OperatorTok">=</text:span><text:span text:style-name="NormalTok"> </text:span><text:span text:style-name="OperatorTok">+</text:span><text:span text:style-name="NormalTok">slider</text:span><text:span text:style-name="OperatorTok">.</text:span><text:span text:style-name="AttributeTok">value</text:span><text:line-break/><text:span text:style-name="NormalTok"> <text:s/></text:span><text:span text:style-name="KeywordTok">const</text:span><text:span text:style-name="NormalTok"> valueEl </text:span><text:span text:style-name="OperatorTok">=</text:span><text:span text:style-name="NormalTok"> </text:span><text:span text:style-name="FunctionTok">$</text:span><text:span text:style-name="NormalTok">(</text:span><text:span text:style-name="VerbatimStringTok">`#v</text:span><text:span text:style-name="SpecialCharTok">${</text:span><text:span text:style-name="NormalTok">index</text:span><text:span text:style-name="SpecialCharTok">}</text:span><text:span text:style-name="VerbatimStringTok">`</text:span><text:span text:style-name="NormalTok">)</text:span><text:line-break/><text:span text:style-name="NormalTok"> <text:s/></text:span><text:span text:style-name="ControlFlowTok">if</text:span><text:span text:style-name="NormalTok"> (valueEl) {</text:span><text:line-break/><text:span text:style-name="NormalTok"> <text:s text:c="3"/></text:span><text:span text:style-name="KeywordTok">const</text:span><text:span text:style-name="NormalTok"> numEl </text:span><text:span text:style-name="OperatorTok">=</text:span><text:span text:style-name="NormalTok"> valueEl</text:span><text:span text:style-name="OperatorTok">.</text:span><text:span text:style-name="FunctionTok">querySelector</text:span><text:span text:style-name="NormalTok">(</text:span><text:span text:style-name="StringTok">'.servo__number'</text:span><text:span text:style-name="NormalTok">)</text:span><text:line-break/><text:span text:style-name="NormalTok"> <text:s text:c="3"/></text:span><text:span text:style-name="ControlFlowTok">if</text:span><text:span text:style-name="NormalTok"> (numEl) numEl</text:span><text:span text:style-name="OperatorTok">.</text:span><text:span text:style-name="AttributeTok">textContent</text:span><text:span text:style-name="NormalTok"> </text:span><text:span text:style-name="OperatorTok">=</text:span><text:span text:style-name="NormalTok"> slider</text:span><text:span text:style-name="OperatorTok">.</text:span><text:span text:style-name="AttributeTok">value</text:span><text:line-break/><text:span text:style-name="NormalTok"> <text:s/>}</text:span><text:line-break/><text:line-break/><text:span text:style-name="NormalTok"> <text:s/></text:span><text:span text:style-name="FunctionTok">updateTrackFill</text:span><text:span text:style-name="NormalTok">(index)</text:span><text:line-break/><text:span text:style-name="NormalTok"> <text:s/></text:span><text:span text:style-name="FunctionTok">updatePacketPreview</text:span><text:span text:style-name="NormalTok">()</text:span><text:line-break/><text:span text:style-name="NormalTok"> <text:s/></text:span><text:span text:style-name="FunctionTok">setServoAngle</text:span><text:span text:style-name="NormalTok">(index</text:span><text:span text:style-name="OperatorTok">,</text:span><text:span text:style-name="NormalTok"> values[index])</text:span><text:line-break/><text:span text:style-name="NormalTok"> <text:s/></text:span><text:span text:style-name="FunctionTok">updateOledAnglesPreview</text:span><text:span text:style-name="NormalTok">()</text:span><text:line-break/><text:line-break/><text:span text:style-name="NormalTok"> <text:s/></text:span><text:span text:style-name="FunctionTok">scheduleServoSend</text:span><text:span text:style-name="NormalTok">()</text:span><text:line-break/><text:span text:style-name="NormalTok">})</text:span></text:p>
      <text:p text:style-name="First_20_Paragraph">Формирование serial-пакета:</text:p>
      <text:p text:style-name="Source_20_Code"><text:span text:style-name="KeywordTok">function</text:span><text:span text:style-name="NormalTok"> </text:span><text:span text:style-name="FunctionTok">buildPacket</text:span><text:span text:style-name="NormalTok">()</text:span><text:span text:style-name="OperatorTok">:</text:span><text:span text:style-name="NormalTok"> </text:span><text:span text:style-name="DataTypeTok">string</text:span><text:span text:style-name="NormalTok"> {</text:span><text:line-break/><text:span text:style-name="NormalTok"> <text:s/></text:span><text:span text:style-name="ControlFlowTok">return</text:span><text:span text:style-name="NormalTok"> SERVO_CONFIG</text:span><text:span text:style-name="OperatorTok">.</text:span><text:span text:style-name="FunctionTok">map</text:span><text:span text:style-name="NormalTok">((s</text:span><text:span text:style-name="OperatorTok">,</text:span><text:span text:style-name="NormalTok"> i) </text:span><text:span text:style-name="KeywordTok">=&gt;</text:span><text:span text:style-name="NormalTok"> s</text:span><text:span text:style-name="OperatorTok">.</text:span><text:span text:style-name="AttributeTok">id</text:span><text:span text:style-name="NormalTok"> </text:span><text:span text:style-name="OperatorTok">+</text:span><text:span text:style-name="NormalTok"> values[i])</text:span><text:span text:style-name="OperatorTok">.</text:span><text:span text:style-name="FunctionTok">join</text:span><text:span text:style-name="NormalTok">(</text:span><text:span text:style-name="StringTok">''</text:span><text:span text:style-name="NormalTok">) </text:span><text:span text:style-name="OperatorTok">+</text:span><text:span text:style-name="NormalTok"> </text:span><text:span text:style-name="StringTok">';'</text:span><text:line-break/><text:span text:style-name="NormalTok">}</text:span></text:p>
      <text:p text:style-name="First_20_Paragraph">Пример результата:</text:p>
      <text:p text:style-name="Source_20_Code"><text:span text:style-name="Verbatim_20_Char">A100B120C60D90E90;</text:span><text:bookmark-end text:name="поток-данных-в-веб-приложении"/></text:p>
      <text:h text:style-name="Heading_20_2" text:outline-level="2"><text:bookmark-start text:name="передача-данных-через-web-serial-api"/>Передача данных через Web Serial API</text:h>
      <text:p text:style-name="First_20_Paragraph">Модуль <text:span text:style-name="Verbatim_20_Char">src/serial.ts</text:span> отвечает за транспортный уровень. Он открывает порт, создаёт reader/writer и передаёт данные между браузером и Arduino.</text:p>
      <text:p text:style-name="Text_20_body">Отправка команды:</text:p>
      <text:p text:style-name="Source_20_Code"><text:span text:style-name="ImportTok">export</text:span><text:span text:style-name="NormalTok"> </text:span><text:span text:style-name="KeywordTok">async</text:span><text:span text:style-name="NormalTok"> </text:span><text:span text:style-name="KeywordTok">function</text:span><text:span text:style-name="NormalTok"> </text:span><text:span text:style-name="FunctionTok">send</text:span><text:span text:style-name="NormalTok">(data</text:span><text:span text:style-name="OperatorTok">:</text:span><text:span text:style-name="NormalTok"> </text:span><text:span text:style-name="DataTypeTok">string</text:span><text:span text:style-name="NormalTok">)</text:span><text:span text:style-name="OperatorTok">:</text:span><text:span text:style-name="NormalTok"> </text:span><text:span text:style-name="BuiltInTok">Promise</text:span><text:span text:style-name="OperatorTok">&lt;</text:span><text:span text:style-name="DataTypeTok">void</text:span><text:span text:style-name="OperatorTok">&gt;</text:span><text:span text:style-name="NormalTok">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writer) {</text:span><text:line-break/><text:span text:style-name="NormalTok"> <text:s text:c="3"/></text:span><text:span text:style-name="ControlFlowTok">throw</text:span><text:span text:style-name="NormalTok"> </text:span><text:span text:style-name="KeywordTok">new</text:span><text:span text:style-name="NormalTok"> </text:span><text:span text:style-name="BuiltInTok">Error</text:span><text:span text:style-name="NormalTok">(</text:span><text:span text:style-name="StringTok">'Не подключено'</text:span><text:span text:style-name="NormalTok">)</text:span><text:line-break/><text:span text:style-name="NormalTok"> <text:s/>}</text:span><text:line-break/><text:line-break/><text:span text:style-name="NormalTok"> <text:s/></text:span><text:span text:style-name="ControlFlowTok">await</text:span><text:span text:style-name="NormalTok"> writer</text:span><text:span text:style-name="OperatorTok">.</text:span><text:span text:style-name="FunctionTok">write</text:span><text:span text:style-name="NormalTok">(textEncoder</text:span><text:span text:style-name="OperatorTok">.</text:span><text:span text:style-name="FunctionTok">encode</text:span><text:span text:style-name="NormalTok">(data))</text:span><text:line-break/><text:span text:style-name="NormalTok">}</text:span></text:p>
      <text:p text:style-name="First_20_Paragraph"><text:soft-page-break/>Отправка servo-пакета из <text:span text:style-name="Verbatim_20_Char">main.ts</text:span>:</text:p>
      <text:p text:style-name="Source_20_Code"><text:span text:style-name="KeywordTok">async</text:span><text:span text:style-name="NormalTok"> </text:span><text:span text:style-name="KeywordTok">function</text:span><text:span text:style-name="NormalTok"> </text:span><text:span text:style-name="FunctionTok">sendServoPacket</text:span><text:span text:style-name="NormalTok">(packet </text:span><text:span text:style-name="OperatorTok">=</text:span><text:span text:style-name="NormalTok"> </text:span><text:span text:style-name="FunctionTok">buildPacket</text:span><text:span text:style-name="NormalTok">()</text:span><text:span text:style-name="OperatorTok">,</text:span><text:span text:style-name="NormalTok"> force </text:span><text:span text:style-name="OperatorTok">=</text:span><text:span text:style-name="NormalTok"> </text:span><text:span text:style-name="KeywordTok">false</text:span><text:span text:style-name="NormalTok">)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serial</text:span><text:span text:style-name="OperatorTok">.</text:span><text:span text:style-name="FunctionTok">isConnected</text:span><text:span text:style-name="NormalTok">()) </text:span><text:span text:style-name="ControlFlowTok">return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force </text:span><text:span text:style-name="OperatorTok">&amp;&amp;</text:span><text:span text:style-name="NormalTok"> packet </text:span><text:span text:style-name="OperatorTok">===</text:span><text:span text:style-name="NormalTok"> lastSentServoPacket) </text:span><text:span text:style-name="ControlFlowTok">return</text:span><text:line-break/><text:line-break/><text:span text:style-name="NormalTok"> <text:s/></text:span><text:span text:style-name="ControlFlowTok">try</text:span><text:span text:style-name="NormalTok"> {</text:span><text:line-break/><text:span text:style-name="NormalTok"> <text:s text:c="3"/></text:span><text:span text:style-name="ControlFlowTok">await</text:span><text:span text:style-name="NormalTok"> serial</text:span><text:span text:style-name="OperatorTok">.</text:span><text:span text:style-name="FunctionTok">send</text:span><text:span text:style-name="NormalTok">(packet)</text:span><text:line-break/><text:span text:style-name="NormalTok"> <text:s text:c="3"/>lastSentServoPacket </text:span><text:span text:style-name="OperatorTok">=</text:span><text:span text:style-name="NormalTok"> packet</text:span><text:line-break/><text:span text:style-name="NormalTok"> <text:s text:c="3"/></text:span><text:span text:style-name="FunctionTok">addLogEntry</text:span><text:span text:style-name="NormalTok">(</text:span><text:span text:style-name="StringTok">'tx'</text:span><text:span text:style-name="OperatorTok">,</text:span><text:span text:style-name="NormalTok"> packet)</text:span><text:line-break/><text:span text:style-name="NormalTok"> <text:s/>} </text:span><text:span text:style-name="ControlFlowTok">catch</text:span><text:span text:style-name="NormalTok"> (err) {</text:span><text:line-break/><text:span text:style-name="NormalTok"> <text:s text:c="3"/></text:span><text:span text:style-name="KeywordTok">const</text:span><text:span text:style-name="NormalTok"> msg </text:span><text:span text:style-name="OperatorTok">=</text:span><text:span text:style-name="NormalTok"> err </text:span><text:span text:style-name="KeywordTok">instanceof</text:span><text:span text:style-name="NormalTok"> </text:span><text:span text:style-name="BuiltInTok">Error</text:span><text:span text:style-name="NormalTok"> </text:span><text:span text:style-name="OperatorTok">?</text:span><text:span text:style-name="NormalTok"> err</text:span><text:span text:style-name="OperatorTok">.</text:span><text:span text:style-name="AttributeTok">message</text:span><text:span text:style-name="NormalTok"> </text:span><text:span text:style-name="OperatorTok">:</text:span><text:span text:style-name="NormalTok"> </text:span><text:span text:style-name="StringTok">'Ошибка отправки'</text:span><text:line-break/><text:span text:style-name="NormalTok"> <text:s text:c="3"/></text:span><text:span text:style-name="FunctionTok">addLogEntry</text:span><text:span text:style-name="NormalTok">(</text:span><text:span text:style-name="StringTok">'err'</text:span><text:span text:style-name="OperatorTok">,</text:span><text:span text:style-name="NormalTok"> msg)</text:span><text:line-break/><text:span text:style-name="NormalTok"> <text:s/>}</text:span><text:line-break/><text:span text:style-name="NormalTok">}</text:span></text:p>
      <text:p text:style-name="First_20_Paragraph">Параметр <text:span text:style-name="Verbatim_20_Char">force</text:span> используется для ручной кнопки <text:span text:style-name="Verbatim_20_Char">Отправить</text:span>: пользовательская отправка должна уходить даже если пакет совпадает с предыдущим.<text:bookmark-end text:name="передача-данных-через-web-serial-api"/></text:p>
      <text:h text:style-name="Heading_20_2" text:outline-level="2"><text:bookmark-start text:name="обработка-пакета-на-arduino"/>Обработка пакета на Arduino</text:h>
      <text:p text:style-name="First_20_Paragraph">Arduino читает входящие символы до <text:span text:style-name="Verbatim_20_Char">;</text:span>, после чего вызывает <text:span text:style-name="Verbatim_20_Char">handleCommand</text:span>.</text:p>
      <text:p text:style-name="Text_20_body">Фрагмент чтения Serial:</text:p>
      <text:p text:style-name="Source_20_Code"><text:span text:style-name="DataTypeTok">void</text:span><text:span text:style-name="NormalTok"> loop</text:span><text:span text:style-name="OperatorTok">()</text:span><text:span text:style-name="NormalTok"> </text:span><text:span text:style-name="OperatorTok">{</text:span><text:line-break/><text:span text:style-name="NormalTok"> <text:s/></text:span><text:span text:style-name="ControlFlowTok">while</text:span><text:span text:style-name="NormalTok"> </text:span><text:span text:style-name="OperatorTok">(</text:span><text:span text:style-name="NormalTok">Serial</text:span><text:span text:style-name="OperatorTok">.</text:span><text:span text:style-name="NormalTok">available</text:span><text:span text:style-name="OperatorTok">()</text:span><text:span text:style-name="NormalTok">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<text:line-break/><text:span text:style-name="NormalTok"> <text:s text:c="3"/></text:span><text:span text:style-name="DataTypeTok">char</text:span><text:span text:style-name="NormalTok"> c </text:span><text:span text:style-name="OperatorTok">=</text:span><text:span text:style-name="NormalTok"> Serial</text:span><text:span text:style-name="OperatorTok">.</text:span><text:span text:style-name="NormalTok">read</text:span><text:span text:style-name="OperatorTok">();</text:span><text:line-break/><text:line-break/><text:span text:style-name="NormalTok"> <text:s text:c="3"/></text:span><text:span text:style-name="ControlFlowTok">if</text:span><text:span text:style-name="NormalTok"> </text:span><text:span text:style-name="OperatorTok">(</text:span><text:span text:style-name="NormalTok">c </text:span><text:span text:style-name="OperatorTok">==</text:span><text:span text:style-name="NormalTok"> </text:span><text:span text:style-name="CharTok">';'</text:span><text:span text:style-name="OperatorTok">)</text:span><text:span text:style-name="NormalTok"> </text:span><text:span text:style-name="OperatorTok">{</text:span><text:line-break/><text:span text:style-name="NormalTok"> <text:s text:c="5"/>serialBuffer</text:span><text:span text:style-name="OperatorTok">[</text:span><text:span text:style-name="NormalTok">serialBufferLength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<text:line-break/><text:span text:style-name="NormalTok"> <text:s text:c="5"/>handleCommand</text:span><text:span text:style-name="OperatorTok">(</text:span><text:span text:style-name="NormalTok">serialBuffer</text:span><text:span text:style-name="OperatorTok">);</text:span><text:line-break/><text:span text:style-name="NormalTok"> <text:s text:c="5"/>serialBufferLength </text:span><text:span text:style-name="OperatorTok">=</text:span><text:span text:style-name="NormalTok"> </text:span><text:span text:style-name="DecValTok">0</text:span><text:span text:style-name="OperatorTok">;</text:span><text:line-break/><text:span text:style-name="NormalTok"> <text:s text:c="5"/>serialBuffer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<text:line-break/><text:span text:style-name="NormalTok"> <text:s text:c="5"/></text:span><text:span text:style-name="ControlFlowTok">continue</text:span><text:span text:style-name="OperatorTok">;</text:span><text:line-break/><text:span text:style-name="NormalTok"> <text:s text:c="3"/></text:span><text:span text:style-name="OperatorTok">}</text:span><text:line-break/><text:line-break/><text:span text:style-name="NormalTok"> <text:s text:c="3"/></text:span><text:span text:style-name="ControlFlowTok">if</text:span><text:span text:style-name="NormalTok"> </text:span><text:span text:style-name="OperatorTok">(</text:span><text:span text:style-name="NormalTok">c </text:span><text:span text:style-name="OperatorTok">==</text:span><text:span text:style-name="NormalTok"> </text:span><text:span text:style-name="CharTok">'</text:span><text:span text:style-name="SpecialCharTok">\n</text:span><text:span text:style-name="CharTok">'</text:span><text:span text:style-name="NormalTok"> </text:span><text:span text:style-name="OperatorTok">||</text:span><text:span text:style-name="NormalTok"> c </text:span><text:span text:style-name="OperatorTok">==</text:span><text:span text:style-name="NormalTok"> </text:span><text:span text:style-name="CharTok">'</text:span><text:span text:style-name="SpecialCharTok">\r</text:span><text:span text:style-name="CharTok">'</text:span><text:span text:style-name="OperatorTok">)</text:span><text:span text:style-name="NormalTok"> </text:span><text:span text:style-name="ControlFlowTok">continue</text:span><text:span text:style-name="OperatorTok">;</text:span><text:line-break/><text:span text:style-name="NormalTok"> <text:s text:c="3"/></text:span><text:span text:style-name="CommentTok">// накопление символов команды</text:span><text:line-break/><text:span text:style-name="NormalTok"> <text:s/></text:span><text:span text:style-name="OperatorTok">}</text:span><text:line-break/><text:span text:style-name="OperatorTok">}</text:span></text:p>
      <text:p text:style-name="First_20_Paragraph">Разбор одного канала:</text:p>
      <text:p text:style-name="Source_20_Code"><text:span text:style-name="DataTypeTok">bool</text:span><text:span text:style-name="NormalTok"> parseChannel</text:span><text:span text:style-name="OperatorTok">(</text:span><text:span text:style-name="AttributeTok">const</text:span><text:span text:style-name="NormalTok"> </text:span><text:span text:style-name="DataTypeTok">char</text:span><text:span text:style-name="NormalTok"> </text:span><text:span text:style-name="OperatorTok">*</text:span><text:span text:style-name="NormalTok">command</text:span><text:span text:style-name="OperatorTok">,</text:span><text:span text:style-name="NormalTok"> </text:span><text:span text:style-name="DataTypeTok">char</text:span><text:span text:style-name="NormalTok"> channel</text:span><text:span text:style-name="OperatorTok">,</text:span><text:line-break/><text:span text:style-name="NormalTok"> <text:s text:c="17"/></text:span><text:span text:style-name="DataTypeTok">int</text:span><text:span text:style-name="NormalTok"> minValue</text:span><text:span text:style-name="OperatorTok">,</text:span><text:span text:style-name="NormalTok"> </text:span><text:span text:style-name="DataTypeTok">int</text:span><text:span text:style-name="NormalTok"> maxValue</text:span><text:span text:style-name="OperatorTok">,</text:span><text:span text:style-name="NormalTok"> </text:span><text:span text:style-name="DataTypeTok">int</text:span><text:span text:style-name="NormalTok"> </text:span><text:span text:style-name="OperatorTok">&amp;</text:span><text:span text:style-name="NormalTok">value</text:span><text:span text:style-name="OperatorTok">)</text:span><text:span text:style-name="NormalTok"> </text:span><text:span text:style-name="OperatorTok">{</text:span><text:line-break/><text:span text:style-name="NormalTok"> <text:s/></text:span><text:span text:style-name="AttributeTok">const</text:span><text:span text:style-name="NormalTok"> </text:span><text:span text:style-name="DataTypeTok">char</text:span><text:span text:style-name="NormalTok"> </text:span><text:span text:style-name="OperatorTok">*</text:span><text:span text:style-name="NormalTok">cursor </text:span><text:span text:style-name="OperatorTok">=</text:span><text:span text:style-name="NormalTok"> strchr</text:span><text:span text:style-name="OperatorTok">(</text:span><text:span text:style-name="NormalTok">command</text:span><text:span text:style-name="OperatorTok">,</text:span><text:span text:style-name="NormalTok"> channel</text:span><text:span text:style-name="OperatorTok">);</text:span><text:line-break/><text:span text:style-name="NormalTok"> <text:s/></text:span><text:span text:style-name="ControlFlowTok">if</text:span><text:span text:style-name="NormalTok"> </text:span><text:span text:style-name="OperatorTok">(</text:span><text:span text:style-name="NormalTok">cursor </text:span><text:span text:style-name="OperatorTok">==</text:span><text:span text:style-name="NormalTok"> NULL</text:span><text:span text:style-name="OperatorTok">)</text:span><text:span text:style-name="NormalTok"> </text:span><text:span text:style-name="ControlFlowTok">return</text:span><text:span text:style-name="NormalTok"> </text:span><text:span text:style-name="KeywordTok">false</text:span><text:span text:style-name="OperatorTok">;</text:span><text:line-break/><text:line-break/><text:span text:style-name="NormalTok"> <text:s/>cursor</text:span><text:span text:style-name="OperatorTok">++;</text:span><text:line-break/><text:span text:style-name="NormalTok"> <text:s/></text:span><text:span text:style-name="ControlFlowTok">if</text:span><text:span text:style-name="NormalTok"> </text:span><text:span text:style-name="OperatorTok">(!</text:span><text:span text:style-name="NormalTok">isDigit</text:span><text:span text:style-name="OperatorTok">(*</text:span><text:span text:style-name="NormalTok">cursor</text:span><text:span text:style-name="OperatorTok">))</text:span><text:span text:style-name="NormalTok"> </text:span><text:span text:style-name="ControlFlowTok">return</text:span><text:span text:style-name="NormalTok"> </text:span><text:span text:style-name="KeywordTok">false</text:span><text:span text:style-name="OperatorTok">;</text:span><text:line-break/><text:soft-page-break/><text:line-break/><text:span text:style-name="NormalTok"> <text:s/></text:span><text:span text:style-name="DataTypeTok">int</text:span><text:span text:style-name="NormalTok"> parsed </text:span><text:span text:style-name="OperatorTok">=</text:span><text:span text:style-name="NormalTok"> </text:span><text:span text:style-name="DecValTok">0</text:span><text:span text:style-name="OperatorTok">;</text:span><text:line-break/><text:span text:style-name="NormalTok"> <text:s/></text:span><text:span text:style-name="ControlFlowTok">while</text:span><text:span text:style-name="NormalTok"> </text:span><text:span text:style-name="OperatorTok">(</text:span><text:span text:style-name="NormalTok">isDigit</text:span><text:span text:style-name="OperatorTok">(*</text:span><text:span text:style-name="NormalTok">cursor</text:span><text:span text:style-name="OperatorTok">))</text:span><text:span text:style-name="NormalTok"> </text:span><text:span text:style-name="OperatorTok">{</text:span><text:line-break/><text:span text:style-name="NormalTok"> <text:s text:c="3"/>parsed </text:span><text:span text:style-name="OperatorTok">=</text:span><text:span text:style-name="NormalTok"> parsed </text:span><text:span text:style-name="OperatorTok">*</text:span><text:span text:style-name="NormalTok"> </text:span><text:span text:style-name="DecValTok">10</text:span><text:span text:style-name="NormalTok"> </text:span><text:span text:style-name="OperatorTok">+</text:span><text:span text:style-name="NormalTok"> </text:span><text:span text:style-name="OperatorTok">(*</text:span><text:span text:style-name="NormalTok">cursor </text:span><text:span text:style-name="OperatorTok">-</text:span><text:span text:style-name="NormalTok"> </text:span><text:span text:style-name="CharTok">'0'</text:span><text:span text:style-name="OperatorTok">);</text:span><text:line-break/><text:span text:style-name="NormalTok"> <text:s text:c="3"/>cursor</text:span><text:span text:style-name="OperatorTok">++;</text:span><text:line-break/><text:span text:style-name="NormalTok"> <text:s/></text:span><text:span text:style-name="OperatorTok">}</text:span><text:line-break/><text:line-break/><text:span text:style-name="NormalTok"> <text:s/>value </text:span><text:span text:style-name="OperatorTok">=</text:span><text:span text:style-name="NormalTok"> constrain</text:span><text:span text:style-name="OperatorTok">(</text:span><text:span text:style-name="NormalTok">parsed</text:span><text:span text:style-name="OperatorTok">,</text:span><text:span text:style-name="NormalTok"> minValue</text:span><text:span text:style-name="OperatorTok">,</text:span><text:span text:style-name="NormalTok"> maxValue</text:span><text:span text:style-name="OperatorTok">);</text:span><text:line-break/><text:span text:style-name="NormalTok"> <text:s/></text:span><text:span text:style-name="ControlFlowTok">return</text:span><text:span text:style-name="NormalTok"> </text:span><text:span text:style-name="KeywordTok">true</text:span><text:span text:style-name="OperatorTok">;</text:span><text:line-break/><text:span text:style-name="OperatorTok">}</text:span></text:p>
      <text:p text:style-name="First_20_Paragraph">Разбор всего servo-пакета:</text:p>
      <text:p text:style-name="Source_20_Code"><text:span text:style-name="DataTypeTok">bool</text:span><text:span text:style-name="NormalTok"> parseServoPacket</text:span><text:span text:style-name="OperatorTok">(</text:span><text:span text:style-name="AttributeTok">const</text:span><text:span text:style-name="NormalTok"> </text:span><text:span text:style-name="DataTypeTok">char</text:span><text:span text:style-name="NormalTok"> </text:span><text:span text:style-name="OperatorTok">*</text:span><text:span text:style-name="NormalTok">command</text:span><text:span text:style-name="OperatorTok">,</text:span><text:span text:style-name="NormalTok"> </text:span><text:span text:style-name="DataTypeTok">int</text:span><text:span text:style-name="NormalTok"> nextAngles</text:span><text:span text:style-name="OperatorTok">[</text:span><text:span text:style-name="NormalTok">SERVO_COUNT</text:span><text:span text:style-name="OperatorTok">])</text:span><text:span text:style-name="NormalTok"> </text:span><text:span text:style-name="OperatorTok">{</text:span><text:line-break/><text:span text:style-name="NormalTok"> <text:s/></text:span><text:span text:style-name="ControlFlowTok">for</text:span><text:span text:style-name="NormalTok"> </text:span><text:span text:style-name="OperatorTok">(</text:span><text:span text:style-name="NormalTok">byte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SERVO_COU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<text:line-break/><text:span text:style-name="NormalTok"> <text:s text:c="3"/></text:span><text:span text:style-name="ControlFlowTok">if</text:span><text:span text:style-name="NormalTok"> </text:span><text:span text:style-name="OperatorTok">(!</text:span><text:span text:style-name="NormalTok">parseChannel</text:span><text:span text:style-name="OperatorTok">(</text:span><text:span text:style-name="NormalTok">command</text:span><text:span text:style-name="OperatorTok">,</text:span><text:span text:style-name="NormalTok"> servoIds</text:span><text:span text:style-name="OperatorTok">[</text:span><text:span text:style-name="NormalTok">i</text:span><text:span text:style-name="OperatorTok">],</text:span><text:line-break/><text:span text:style-name="NormalTok"> <text:s text:c="21"/>servoMin</text:span><text:span text:style-name="OperatorTok">[</text:span><text:span text:style-name="NormalTok">i</text:span><text:span text:style-name="OperatorTok">],</text:span><text:span text:style-name="NormalTok"> servoMax</text:span><text:span text:style-name="OperatorTok">[</text:span><text:span text:style-name="NormalTok">i</text:span><text:span text:style-name="OperatorTok">],</text:span><text:span text:style-name="NormalTok"> nextAngles</text:span><text:span text:style-name="OperatorTok">[</text:span><text:span text:style-name="NormalTok">i</text:span><text:span text:style-name="OperatorTok">]))</text:span><text:span text:style-name="NormalTok"> </text:span><text:span text:style-name="OperatorTok">{</text:span><text:line-break/><text:span text:style-name="NormalTok"> <text:s text:c="5"/></text:span><text:span text:style-name="ControlFlowTok">return</text:span><text:span text:style-name="NormalTok"> </text:span><text:span text:style-name="KeywordTok">false</text:span><text:span text:style-name="OperatorTok">;</text:span><text:line-break/><text:span text:style-name="NormalTok"> <text:s text:c="3"/></text:span><text:span text:style-name="OperatorTok">}</text:span><text:line-break/><text:span text:style-name="NormalTok"> <text:s/></text:span><text:span text:style-name="OperatorTok">}</text:span><text:line-break/><text:line-break/><text:span text:style-name="NormalTok"> <text:s/></text:span><text:span text:style-name="ControlFlowTok">return</text:span><text:span text:style-name="NormalTok"> </text:span><text:span text:style-name="KeywordTok">true</text:span><text:span text:style-name="OperatorTok">;</text:span><text:line-break/><text:span text:style-name="OperatorTok">}</text:span></text:p>
      <text:p text:style-name="First_20_Paragraph">Применение углов:</text:p>
      <text:p text:style-name="Source_20_Code"><text:span text:style-name="DataTypeTok">void</text:span><text:span text:style-name="NormalTok"> applyServoAngles</text:span><text:span text:style-name="OperatorTok">(</text:span><text:span text:style-name="AttributeTok">const</text:span><text:span text:style-name="NormalTok"> </text:span><text:span text:style-name="DataTypeTok">int</text:span><text:span text:style-name="NormalTok"> nextAngles</text:span><text:span text:style-name="OperatorTok">[</text:span><text:span text:style-name="NormalTok">SERVO_COUNT</text:span><text:span text:style-name="OperatorTok">])</text:span><text:span text:style-name="NormalTok"> </text:span><text:span text:style-name="OperatorTok">{</text:span><text:line-break/><text:span text:style-name="NormalTok"> <text:s/>setupServos</text:span><text:span text:style-name="OperatorTok">();</text:span><text:line-break/><text:line-break/><text:span text:style-name="NormalTok"> <text:s/></text:span><text:span text:style-name="ControlFlowTok">for</text:span><text:span text:style-name="NormalTok"> </text:span><text:span text:style-name="OperatorTok">(</text:span><text:span text:style-name="NormalTok">byte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SERVO_COU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<text:line-break/><text:span text:style-name="NormalTok"> <text:s text:c="3"/>servoAngles</text:span><text:span text:style-name="OperatorTok">[</text:span><text:span text:style-name="NormalTok">i</text:span><text:span text:style-name="OperatorTok">]</text:span><text:span text:style-name="NormalTok"> </text:span><text:span text:style-name="OperatorTok">=</text:span><text:span text:style-name="NormalTok"> nextAngles</text:span><text:span text:style-name="OperatorTok">[</text:span><text:span text:style-name="NormalTok">i</text:span><text:span text:style-name="OperatorTok">];</text:span><text:line-break/><text:span text:style-name="NormalTok"> <text:s text:c="3"/>servos</text:span><text:span text:style-name="OperatorTok">[</text:span><text:span text:style-name="NormalTok">i</text:span><text:span text:style-name="OperatorTok">].</text:span><text:span text:style-name="NormalTok">write</text:span><text:span text:style-name="OperatorTok">(</text:span><text:span text:style-name="NormalTok">servoAngles</text:span><text:span text:style-name="OperatorTok">[</text:span><text:span text:style-name="NormalTok">i</text:span><text:span text:style-name="OperatorTok">]);</text:span><text:line-break/><text:span text:style-name="NormalTok"> <text:s/></text:span><text:span text:style-name="OperatorTok">}</text:span><text:line-break/><text:line-break/><text:span text:style-name="NormalTok"> <text:s/></text:span><text:span text:style-name="ControlFlowTok">if</text:span><text:span text:style-name="NormalTok"> </text:span><text:span text:style-name="OperatorTok">(</text:span><text:span text:style-name="NormalTok">oledMode </text:span><text:span text:style-name="OperatorTok">==</text:span><text:span text:style-name="NormalTok"> OLED_MODE_ANGLES</text:span><text:span text:style-name="OperatorTok">)</text:span><text:span text:style-name="NormalTok"> </text:span><text:span text:style-name="OperatorTok">{</text:span><text:line-break/><text:span text:style-name="NormalTok"> <text:s text:c="3"/>showAngles</text:span><text:span text:style-name="OperatorTok">();</text:span><text:line-break/><text:span text:style-name="NormalTok"> <text:s/></text:span><text:span text:style-name="OperatorTok">}</text:span><text:line-break/><text:span text:style-name="OperatorTok">}</text:span></text:p>
      <text:p text:style-name="First_20_Paragraph">Сервоприводы подключаются лениво: <text:span text:style-name="Verbatim_20_Char">setupServos()</text:span> вызывается только при первой servo-команде. Это уменьшает вероятность рывка сразу после старта прошивки.</text:p>
      <text:p text:style-name="Source_20_Code"><text:span text:style-name="DataTypeTok">void</text:span><text:span text:style-name="NormalTok"> setupServos</text:span><text:span text:style-name="OperatorTok">()</text:span><text:span text:style-name="NormalTok"> </text:span><text:span text:style-name="OperatorTok">{</text:span><text:line-break/><text:span text:style-name="NormalTok"> <text:s/></text:span><text:span text:style-name="ControlFlowTok">if</text:span><text:span text:style-name="NormalTok"> </text:span><text:span text:style-name="OperatorTok">(</text:span><text:span text:style-name="NormalTok">servosAttached</text:span><text:span text:style-name="OperatorTok">)</text:span><text:span text:style-name="NormalTok"> </text:span><text:span text:style-name="ControlFlowTok">return</text:span><text:span text:style-name="OperatorTok">;</text:span><text:line-break/><text:line-break/><text:span text:style-name="NormalTok"> <text:s/></text:span><text:span text:style-name="ControlFlowTok">for</text:span><text:span text:style-name="NormalTok"> </text:span><text:span text:style-name="OperatorTok">(</text:span><text:span text:style-name="NormalTok">byte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SERVO_COU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<text:line-break/><text:span text:style-name="NormalTok"> <text:s text:c="3"/>servos</text:span><text:span text:style-name="OperatorTok">[</text:span><text:span text:style-name="NormalTok">i</text:span><text:span text:style-name="OperatorTok">].</text:span><text:span text:style-name="NormalTok">attach</text:span><text:span text:style-name="OperatorTok">(</text:span><text:span text:style-name="NormalTok">servoPins</text:span><text:span text:style-name="OperatorTok">[</text:span><text:span text:style-name="NormalTok">i</text:span><text:span text:style-name="OperatorTok">]);</text:span><text:line-break/><text:span text:style-name="NormalTok"> <text:s/></text:span><text:span text:style-name="OperatorTok">}</text:span><text:line-break/><text:line-break/><text:span text:style-name="NormalTok"> <text:s/>servosAttached </text:span><text:span text:style-name="OperatorTok">=</text:span><text:span text:style-name="NormalTok"> </text:span><text:span text:style-name="KeywordTok">true</text:span><text:span text:style-name="OperatorTok">;</text:span><text:line-break/><text:span text:style-name="OperatorTok">}</text:span><text:bookmark-end text:name="обработка-пакета-на-arduino"/></text:p>
      <text:h text:style-name="Heading_20_2" text:outline-level="2"><text:bookmark-start text:name="связь-с-цифровым-двойником-three.js"/><text:soft-page-break/>Связь с цифровым двойником Three.js</text:h>
      <text:p text:style-name="First_20_Paragraph">3D-модель используется как цифровой двойник роборуки. При движении слайдеров она обновляется сразу, независимо от того, подключена Arduino или нет.</text:p>
      <text:p text:style-name="Text_20_body">Публичная функция установки угла:</text:p>
      <text:p text:style-name="Source_20_Code"><text:span text:style-name="ImportTok">export</text:span><text:span text:style-name="NormalTok"> </text:span><text:span text:style-name="KeywordTok">function</text:span><text:span text:style-name="NormalTok"> </text:span><text:span text:style-name="FunctionTok">setServoAngle</text:span><text:span text:style-name="NormalTok">(servoIndex</text:span><text:span text:style-name="OperatorTok">:</text:span><text:span text:style-name="NormalTok"> </text:span><text:span text:style-name="DataTypeTok">number</text:span><text:span text:style-name="OperatorTok">,</text:span><text:span text:style-name="NormalTok"> angle</text:span><text:span text:style-name="OperatorTok">:</text:span><text:span text:style-name="NormalTok"> </text:span><text:span text:style-name="DataTypeTok">number</text:span><text:span text:style-name="NormalTok">) {</text:span><text:line-break/><text:span text:style-name="NormalTok"> <text:s/></text:span><text:span text:style-name="ControlFlowTok">switch</text:span><text:span text:style-name="NormalTok"> (servoIndex) {</text:span><text:line-break/><text:span text:style-name="NormalTok"> <text:s text:c="3"/></text:span><text:span text:style-name="ControlFlowTok">case</text:span><text:span text:style-name="NormalTok"> </text:span><text:span text:style-name="DecValTok">0</text:span><text:span text:style-name="OperatorTok">:</text:span><text:line-break/><text:span text:style-name="NormalTok"> <text:s text:c="5"/>targetAngles</text:span><text:span text:style-name="OperatorTok">.</text:span><text:span text:style-name="AttributeTok">base</text:span><text:span text:style-name="NormalTok"> </text:span><text:span text:style-name="OperatorTok">=</text:span><text:span text:style-name="NormalTok"> angle</text:span><text:line-break/><text:span text:style-name="NormalTok"> <text:s text:c="5"/></text:span><text:span text:style-name="ControlFlowTok">break</text:span><text:line-break/><text:span text:style-name="NormalTok"> <text:s text:c="3"/></text:span><text:span text:style-name="ControlFlowTok">case</text:span><text:span text:style-name="NormalTok"> </text:span><text:span text:style-name="DecValTok">1</text:span><text:span text:style-name="OperatorTok">:</text:span><text:line-break/><text:span text:style-name="NormalTok"> <text:s text:c="5"/>targetAngles</text:span><text:span text:style-name="OperatorTok">.</text:span><text:span text:style-name="AttributeTok">shoulder</text:span><text:span text:style-name="NormalTok"> </text:span><text:span text:style-name="OperatorTok">=</text:span><text:span text:style-name="NormalTok"> angle</text:span><text:line-break/><text:span text:style-name="NormalTok"> <text:s text:c="5"/></text:span><text:span text:style-name="ControlFlowTok">break</text:span><text:line-break/><text:span text:style-name="NormalTok"> <text:s text:c="3"/></text:span><text:span text:style-name="ControlFlowTok">case</text:span><text:span text:style-name="NormalTok"> </text:span><text:span text:style-name="DecValTok">2</text:span><text:span text:style-name="OperatorTok">:</text:span><text:line-break/><text:span text:style-name="NormalTok"> <text:s text:c="5"/>targetAngles</text:span><text:span text:style-name="OperatorTok">.</text:span><text:span text:style-name="AttributeTok">elbow</text:span><text:span text:style-name="NormalTok"> </text:span><text:span text:style-name="OperatorTok">=</text:span><text:span text:style-name="NormalTok"> angle</text:span><text:line-break/><text:span text:style-name="NormalTok"> <text:s text:c="5"/></text:span><text:span text:style-name="ControlFlowTok">break</text:span><text:line-break/><text:span text:style-name="NormalTok"> <text:s text:c="3"/></text:span><text:span text:style-name="ControlFlowTok">case</text:span><text:span text:style-name="NormalTok"> </text:span><text:span text:style-name="DecValTok">3</text:span><text:span text:style-name="OperatorTok">:</text:span><text:line-break/><text:span text:style-name="NormalTok"> <text:s text:c="5"/>targetAngles</text:span><text:span text:style-name="OperatorTok">.</text:span><text:span text:style-name="AttributeTok">wrist</text:span><text:span text:style-name="NormalTok"> </text:span><text:span text:style-name="OperatorTok">=</text:span><text:span text:style-name="NormalTok"> angle</text:span><text:line-break/><text:span text:style-name="NormalTok"> <text:s text:c="5"/></text:span><text:span text:style-name="ControlFlowTok">break</text:span><text:line-break/><text:span text:style-name="NormalTok"> <text:s text:c="3"/></text:span><text:span text:style-name="ControlFlowTok">case</text:span><text:span text:style-name="NormalTok"> </text:span><text:span text:style-name="DecValTok">4</text:span><text:span text:style-name="OperatorTok">:</text:span><text:line-break/><text:span text:style-name="NormalTok"> <text:s text:c="5"/>targetAngles</text:span><text:span text:style-name="OperatorTok">.</text:span><text:span text:style-name="AttributeTok">gripper</text:span><text:span text:style-name="NormalTok"> </text:span><text:span text:style-name="OperatorTok">=</text:span><text:span text:style-name="NormalTok"> angle</text:span><text:line-break/><text:span text:style-name="NormalTok"> <text:s text:c="5"/></text:span><text:span text:style-name="ControlFlowTok">break</text:span><text:line-break/><text:span text:style-name="NormalTok"> <text:s/>}</text:span><text:line-break/><text:span text:style-name="NormalTok">}</text:span></text:p>
      <text:p text:style-name="First_20_Paragraph">Применение углов к объектам модели:</text:p>
      <text:p text:style-name="Source_20_Code"><text:span text:style-name="ControlFlowTok">if</text:span><text:span text:style-name="NormalTok"> (parts</text:span><text:span text:style-name="OperatorTok">.</text:span><text:span text:style-name="AttributeTok">base</text:span><text:span text:style-name="NormalTok">) {</text:span><text:line-break/><text:span text:style-name="NormalTok"> <text:s/>parts</text:span><text:span text:style-name="OperatorTok">.</text:span><text:span text:style-name="AttributeTok">base</text:span><text:span text:style-name="OperatorTok">.</text:span><text:span text:style-name="AttributeTok">rotation</text:span><text:span text:style-name="OperatorTok">.</text:span><text:span text:style-name="AttributeTok">y</text:span><text:span text:style-name="NormalTok"> </text:span><text:span text:style-name="OperatorTok">=</text:span><text:span text:style-name="NormalTok"> THREE</text:span><text:span text:style-name="OperatorTok">.</text:span><text:span text:style-name="AttributeTok">MathUtils</text:span><text:span text:style-name="OperatorTok">.</text:span><text:span text:style-name="FunctionTok">degToRad</text:span><text:span text:style-name="NormalTok">(targetAngles</text:span><text:span text:style-name="OperatorTok">.</text:span><text:span text:style-name="AttributeTok">base</text:span><text:span text:style-name="NormalTok">)</text:span><text:line-break/><text:span text:style-name="NormalTok">}</text:span><text:line-break/><text:span text:style-name="ControlFlowTok">if</text:span><text:span text:style-name="NormalTok"> (parts</text:span><text:span text:style-name="OperatorTok">.</text:span><text:span text:style-name="AttributeTok">shoulder</text:span><text:span text:style-name="NormalTok">) {</text:span><text:line-break/><text:span text:style-name="NormalTok"> <text:s/>parts</text:span><text:span text:style-name="OperatorTok">.</text:span><text:span text:style-name="AttributeTok">shoulder</text:span><text:span text:style-name="OperatorTok">.</text:span><text:span text:style-name="AttributeTok">rotation</text:span><text:span text:style-name="OperatorTok">.</text:span><text:span text:style-name="AttributeTok">x</text:span><text:span text:style-name="NormalTok"> </text:span><text:span text:style-name="OperatorTok">=</text:span><text:span text:style-name="NormalTok"> THREE</text:span><text:span text:style-name="OperatorTok">.</text:span><text:span text:style-name="AttributeTok">MathUtils</text:span><text:span text:style-name="OperatorTok">.</text:span><text:span text:style-name="FunctionTok">degToRad</text:span><text:span text:style-name="NormalTok">(</text:span><text:line-break/><text:span text:style-name="NormalTok"> <text:s text:c="3"/>targetAngles</text:span><text:span text:style-name="OperatorTok">.</text:span><text:span text:style-name="AttributeTok">shoulder</text:span><text:span text:style-name="NormalTok"> </text:span><text:span text:style-name="OperatorTok">-</text:span><text:span text:style-name="NormalTok"> </text:span><text:span text:style-name="DecValTok">90</text:span><text:line-break/><text:span text:style-name="NormalTok"> <text:s/>)</text:span><text:line-break/><text:span text:style-name="NormalTok">}</text:span><text:line-break/><text:span text:style-name="ControlFlowTok">if</text:span><text:span text:style-name="NormalTok"> (parts</text:span><text:span text:style-name="OperatorTok">.</text:span><text:span text:style-name="AttributeTok">elbow</text:span><text:span text:style-name="NormalTok">) {</text:span><text:line-break/><text:span text:style-name="NormalTok"> <text:s/>parts</text:span><text:span text:style-name="OperatorTok">.</text:span><text:span text:style-name="AttributeTok">elbow</text:span><text:span text:style-name="OperatorTok">.</text:span><text:span text:style-name="AttributeTok">rotation</text:span><text:span text:style-name="OperatorTok">.</text:span><text:span text:style-name="AttributeTok">x</text:span><text:span text:style-name="NormalTok"> </text:span><text:span text:style-name="OperatorTok">=</text:span><text:span text:style-name="NormalTok"> THREE</text:span><text:span text:style-name="OperatorTok">.</text:span><text:span text:style-name="AttributeTok">MathUtils</text:span><text:span text:style-name="OperatorTok">.</text:span><text:span text:style-name="FunctionTok">degToRad</text:span><text:span text:style-name="NormalTok">(targetAngles</text:span><text:span text:style-name="OperatorTok">.</text:span><text:span text:style-name="AttributeTok">elbow</text:span><text:span text:style-name="NormalTok"> </text:span><text:span text:style-name="OperatorTok">-</text:span><text:span text:style-name="NormalTok"> </text:span><text:span text:style-name="DecValTok">90</text:span><text:span text:style-name="NormalTok">)</text:span><text:line-break/><text:span text:style-name="NormalTok">}</text:span></text:p>
      <text:p text:style-name="First_20_Paragraph">Смещение <text:span text:style-name="Verbatim_20_Char">-90</text:span> для плеча и локтя — это калибровка под нулевую позу экспортированной GLB-модели. В ходе работы этот mapping не изменялся, чтобы не сломать уже рабочее управление 3D-моделью.<text:bookmark-end text:name="связь-с-цифровым-двойником-three.js"/></text:p>
      <text:h text:style-name="Heading_20_2" text:outline-level="2"><text:bookmark-start text:name="throttled-debounce-авто-отправки"/>Throttled debounce авто-отправки</text:h>
      <text:p text:style-name="First_20_Paragraph">Обычный HTML-слайдер генерирует много событий <text:span text:style-name="Verbatim_20_Char">input</text:span> во время движения. Если отправлять serial-пакет на каждое событие, можно создать слишком плотный поток команд. Для Arduino на <text:span text:style-name="Verbatim_20_Char">9600 baud</text:span> это нежелательно: устройство будет постоянно получать команды, а лог интерфейса быстро заполнится.</text:p>
      <text:p text:style-name="Text_20_body"><text:soft-page-break/>В проекте реализован throttled debounce. Это не классический debounce, который ждёт полной остановки пользователя. Здесь используется другой подход:</text:p>
      <text:list text:continue-list="list134349918711253" text:style-name="WWNum1005">
        <text:list-item>
          <text:p text:style-name="P27">при каждом изменении слайдера сохраняется последний актуальный пакет;</text:p>
        </text:list-item>
        <text:list-item>
          <text:p text:style-name="P27">если таймер уже запущен, новый таймер не создаётся;</text:p>
        </text:list-item>
        <text:list-item>
          <text:p text:style-name="P27">через 80 мс отправляется последний сохранённый пакет;</text:p>
        </text:list-item>
        <text:list-item>
          <text:p text:style-name="P27">при непрерывном движении получается ограничение частоты отправки примерно до 12.5 пакетов в секунду;</text:p>
        </text:list-item>
        <text:list-item>
          <text:p text:style-name="P27">одинаковые пакеты не отправляются повторно.</text:p>
        </text:list-item>
      </text:list>
      <text:p text:style-name="First_20_Paragraph">Константа задержки:</text:p>
      <text:p text:style-name="Source_20_Code"><text:span text:style-name="KeywordTok">const</text:span><text:span text:style-name="NormalTok"> SERVO_SEND_DEBOUNCE_MS </text:span><text:span text:style-name="OperatorTok">=</text:span><text:span text:style-name="NormalTok"> </text:span><text:span text:style-name="DecValTok">80</text:span></text:p>
      <text:p text:style-name="First_20_Paragraph">Переменные для авто-отправки:</text:p>
      <text:p text:style-name="Source_20_Code"><text:span text:style-name="KeywordTok">let</text:span><text:span text:style-name="NormalTok"> autoSend </text:span><text:span text:style-name="OperatorTok">=</text:span><text:span text:style-name="NormalTok"> </text:span><text:span text:style-name="KeywordTok">false</text:span><text:line-break/><text:span text:style-name="KeywordTok">let</text:span><text:span text:style-name="NormalTok"> pendingServoPacket</text:span><text:span text:style-name="OperatorTok">:</text:span><text:span text:style-name="NormalTok"> </text:span><text:span text:style-name="DataTypeTok">string</text:span><text:span text:style-name="NormalTok"> </text:span><text:span text:style-name="OperatorTok">|</text:span><text:span text:style-name="NormalTok"> </text:span><text:span text:style-name="DataTypeTok">null</text:span><text:span text:style-name="NormalTok"> </text:span><text:span text:style-name="OperatorTok">=</text:span><text:span text:style-name="NormalTok"> </text:span><text:span text:style-name="KeywordTok">null</text:span><text:line-break/><text:span text:style-name="KeywordTok">let</text:span><text:span text:style-name="NormalTok"> servoSendTimer</text:span><text:span text:style-name="OperatorTok">:</text:span><text:span text:style-name="NormalTok"> </text:span><text:span text:style-name="BuiltInTok">ReturnType</text:span><text:span text:style-name="OperatorTok">&lt;</text:span><text:span text:style-name="KeywordTok">typeof</text:span><text:span text:style-name="NormalTok"> setTimeout</text:span><text:span text:style-name="OperatorTok">&gt;</text:span><text:span text:style-name="NormalTok"> </text:span><text:span text:style-name="OperatorTok">|</text:span><text:span text:style-name="NormalTok"> </text:span><text:span text:style-name="DataTypeTok">null</text:span><text:span text:style-name="NormalTok"> </text:span><text:span text:style-name="OperatorTok">=</text:span><text:span text:style-name="NormalTok"> </text:span><text:span text:style-name="KeywordTok">null</text:span><text:line-break/><text:span text:style-name="KeywordTok">let</text:span><text:span text:style-name="NormalTok"> lastSentServoPacket </text:span><text:span text:style-name="OperatorTok">=</text:span><text:span text:style-name="NormalTok"> </text:span><text:span text:style-name="StringTok">''</text:span></text:p>
      <text:p text:style-name="First_20_Paragraph">Планирование отправки:</text:p>
      <text:p text:style-name="Source_20_Code"><text:span text:style-name="KeywordTok">function</text:span><text:span text:style-name="NormalTok"> </text:span><text:span text:style-name="FunctionTok">scheduleServoSend</text:span><text:span text:style-name="NormalTok">()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autoSend </text:span><text:span text:style-name="OperatorTok">||</text:span><text:span text:style-name="NormalTok"> </text:span><text:span text:style-name="OperatorTok">!</text:span><text:span text:style-name="NormalTok">serial</text:span><text:span text:style-name="OperatorTok">.</text:span><text:span text:style-name="FunctionTok">isConnected</text:span><text:span text:style-name="NormalTok">()) </text:span><text:span text:style-name="ControlFlowTok">return</text:span><text:line-break/><text:line-break/><text:span text:style-name="NormalTok"> <text:s/>pendingServoPacket </text:span><text:span text:style-name="OperatorTok">=</text:span><text:span text:style-name="NormalTok"> </text:span><text:span text:style-name="FunctionTok">buildPacket</text:span><text:span text:style-name="NormalTok">()</text:span><text:line-break/><text:span text:style-name="NormalTok"> <text:s/></text:span><text:span text:style-name="ControlFlowTok">if</text:span><text:span text:style-name="NormalTok"> (servoSendTimer) </text:span><text:span text:style-name="ControlFlowTok">return</text:span><text:line-break/><text:line-break/><text:span text:style-name="NormalTok"> <text:s/>servoSendTimer </text:span><text:span text:style-name="OperatorTok">=</text:span><text:span text:style-name="NormalTok"> </text:span><text:span text:style-name="PreprocessorTok">setTimeout</text:span><text:span text:style-name="NormalTok">(() </text:span><text:span text:style-name="KeywordTok">=&gt;</text:span><text:span text:style-name="NormalTok"> {</text:span><text:line-break/><text:span text:style-name="NormalTok"> <text:s text:c="3"/></text:span><text:span text:style-name="KeywordTok">const</text:span><text:span text:style-name="NormalTok"> packet </text:span><text:span text:style-name="OperatorTok">=</text:span><text:span text:style-name="NormalTok"> pendingServoPacket</text:span><text:line-break/><text:span text:style-name="NormalTok"> <text:s text:c="3"/>pendingServoPacket </text:span><text:span text:style-name="OperatorTok">=</text:span><text:span text:style-name="NormalTok"> </text:span><text:span text:style-name="KeywordTok">null</text:span><text:line-break/><text:span text:style-name="NormalTok"> <text:s text:c="3"/>servoSendTimer </text:span><text:span text:style-name="OperatorTok">=</text:span><text:span text:style-name="NormalTok"> </text:span><text:span text:style-name="KeywordTok">null</text:span><text:line-break/><text:span text:style-name="NormalTok"> <text:s text:c="3"/></text:span><text:span text:style-name="ControlFlowTok">if</text:span><text:span text:style-name="NormalTok"> (packet) </text:span><text:span text:style-name="FunctionTok">sendServoPacket</text:span><text:span text:style-name="NormalTok">(packet)</text:span><text:line-break/><text:span text:style-name="NormalTok"> <text:s/>}</text:span><text:span text:style-name="OperatorTok">,</text:span><text:span text:style-name="NormalTok"> SERVO_SEND_DEBOUNCE_MS)</text:span><text:line-break/><text:span text:style-name="NormalTok">}</text:span></text:p>
      <text:p text:style-name="First_20_Paragraph">Защита от повторной отправки такого же пакета:</text:p>
      <text:p text:style-name="Source_20_Code"><text:span text:style-name="ControlFlowTok">if</text:span><text:span text:style-name="NormalTok"> (</text:span><text:span text:style-name="OperatorTok">!</text:span><text:span text:style-name="NormalTok">force </text:span><text:span text:style-name="OperatorTok">&amp;&amp;</text:span><text:span text:style-name="NormalTok"> packet </text:span><text:span text:style-name="OperatorTok">===</text:span><text:span text:style-name="NormalTok"> lastSentServoPacket) </text:span><text:span text:style-name="ControlFlowTok">return</text:span></text:p>
      <text:p text:style-name="First_20_Paragraph">Ручная отправка работает иначе:</text:p>
      <text:p text:style-name="Source_20_Code"><text:span text:style-name="NormalTok">btnSend</text:span><text:span text:style-name="OperatorTok">?.</text:span><text:span text:style-name="FunctionTok">addEventListener</text:span><text:span text:style-name="NormalTok">(</text:span><text:span text:style-name="StringTok">'click'</text:span><text:span text:style-name="OperatorTok">,</text:span><text:span text:style-name="NormalTok"> </text:span><text:span text:style-name="KeywordTok">async</text:span><text:span text:style-name="NormalTok"> () </text:span><text:span text:style-name="KeywordTok">=&gt;</text:span><text:span text:style-name="NormalTok"> {</text:span><text:line-break/><text:span text:style-name="NormalTok"> <text:s/></text:span><text:span text:style-name="ControlFlowTok">if</text:span><text:span text:style-name="NormalTok"> (</text:span><text:span text:style-name="OperatorTok">!</text:span><text:span text:style-name="NormalTok">serial</text:span><text:span text:style-name="OperatorTok">.</text:span><text:span text:style-name="FunctionTok">isConnected</text:span><text:span text:style-name="NormalTok">()) </text:span><text:span text:style-name="ControlFlowTok">return</text:span><text:line-break/><text:line-break/><text:span text:style-name="NormalTok"> <text:s/></text:span><text:span text:style-name="FunctionTok">cancelPendingServoSend</text:span><text:span text:style-name="NormalTok">()</text:span><text:line-break/><text:span text:style-name="NormalTok"> <text:s/></text:span><text:span text:style-name="ControlFlowTok">await</text:span><text:span text:style-name="NormalTok"> </text:span><text:span text:style-name="FunctionTok">sendServoPacket</text:span><text:span text:style-name="NormalTok">(</text:span><text:span text:style-name="FunctionTok">buildPacket</text:span><text:span text:style-name="NormalTok">()</text:span><text:span text:style-name="OperatorTok">,</text:span><text:span text:style-name="NormalTok"> </text:span><text:span text:style-name="KeywordTok">true</text:span><text:span text:style-name="NormalTok">)</text:span><text:line-break/><text:span text:style-name="NormalTok">})</text:span></text:p>
      <text:p text:style-name="First_20_Paragraph">Здесь <text:span text:style-name="Verbatim_20_Char">force = true</text:span>, поэтому пользовательская команда отправляется всегда.</text:p>
      <text:p text:style-name="Text_20_body"><text:soft-page-break/>Преимущество такой реализации: 3D-модель и UI остаются отзывчивыми и обновляются на каждое движение слайдера, но Arduino получает команды с ограниченной частотой.<text:bookmark-end text:name="throttled-debounce-авто-отправки"/></text:p>
      <text:h text:style-name="Heading_20_2" text:outline-level="2"><text:bookmark-start text:name="результаты-проверки"/>Результаты проверки</text:h>
      <text:p text:style-name="First_20_Paragraph">Прошивка была скомпилирована для Arduino Nano и Arduino Uno.</text:p>
      <text:p text:style-name="Text_20_body">Результат для Nano:</text:p>
      <text:p text:style-name="Source_20_Code"><text:span text:style-name="Verbatim_20_Char">Sketch uses 19756 bytes (64%) of program storage space.</text:span><text:line-break/><text:span text:style-name="Verbatim_20_Char">Global variables use 1017 bytes (49%) of dynamic memory.</text:span></text:p>
      <text:p text:style-name="First_20_Paragraph">Результат для Uno:</text:p>
      <text:p text:style-name="Source_20_Code"><text:span text:style-name="Verbatim_20_Char">Sketch uses 19756 bytes (61%) of program storage space.</text:span><text:line-break/><text:span text:style-name="Verbatim_20_Char">Global variables use 1017 bytes (49%) of dynamic memory.</text:span></text:p>
      <text:p text:style-name="First_20_Paragraph">Проверка через веб-интерфейс на тестовой Uno показала:</text:p>
      <text:p text:style-name="Source_20_Code"><text:span text:style-name="Verbatim_20_Char">TX A100B120C60D90E90;</text:span><text:line-break/><text:span text:style-name="Verbatim_20_Char">RX %A100 B120 C60 D90 E90%;</text:span><text:line-break/><text:span text:style-name="Verbatim_20_Char">RX OK SERVOS A100B120C60D90E90;</text:span></text:p>
      <text:p text:style-name="First_20_Paragraph">Ответ <text:span text:style-name="Verbatim_20_Char">%A100 B120 C60 D90 E90%;</text:span> появился потому, что был включён режим <text:span text:style-name="Verbatim_20_Char">OLED_ANGLES?</text:span>. Это удобно для отладки: OLED-контур подтверждает актуальные углы, а строка <text:span text:style-name="Verbatim_20_Char">OK SERVOS ...</text:span> подтверждает успешное применение servo-пакета.</text:p>
      <text:p text:style-name="Text_20_body">Также была проверена защита диапазона захвата:</text:p>
      <text:p text:style-name="Source_20_Code"><text:span text:style-name="Verbatim_20_Char">A0B0C0D0E180;</text:span><text:line-break/><text:span text:style-name="Verbatim_20_Char">OK SERVOS A0B0C0D0E90;</text:span></text:p>
      <text:p text:style-name="First_20_Paragraph">Значение <text:span text:style-name="Verbatim_20_Char">E180</text:span> было ограничено до <text:span text:style-name="Verbatim_20_Char">E90</text:span>, что подтверждает работу <text:span text:style-name="Verbatim_20_Char">constrain</text:span>.<text:bookmark-end text:name="результаты-проверки"/></text:p>
      <text:h text:style-name="Heading_20_2" text:outline-level="2"><text:bookmark-start text:name="вывод"/>Вывод</text:h>
      <text:p text:style-name="First_20_Paragraph">В работе реализовано управление роботом через веб-интерфейс и COM-порт. Пользователь меняет углы слайдерами, веб-приложение сразу обновляет цифровой двойник на Three.js и формирует serial-пакет для Arduino. Arduino принимает команду, проверяет наличие всех каналов, ограничивает значения безопасными диапазонами и вызывает <text:span text:style-name="Verbatim_20_Char">Servo.write</text:span>.</text:p>
      <text:p text:style-name="Text_20_body">Особое внимание уделено авто-отправке. Throttled debounce позволяет не перегружать COM-порт и Arduino большим количеством команд при движении слайдеров. При этом интерфейс остаётся отзывчивым, а последняя актуальная позиция регулярно отправляется на устройство.<text:bookmark-end text:name="X8f1b8a9c9155c4d1c35657657d0596afee04616"/><text:bookmark-end text:name="вывод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false" style:font-name-asian="F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ru" fo:country="RU" style:letter-kerning="false" style:font-name-asian="F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parent-style-name="Title" style:next-style-name="Text_20_body">
      <style:paragraph-properties fo:keep-together="always" fo:keep-with-next="always"/>
      <style:text-properties fo:font-size="12pt" style:font-size-asian="12pt" style:font-size-complex="12pt"/>
    </style:style>
    <style:style style:name="Date" style:family="paragraph" style:parent-style-name="Title" style:next-style-name="Text_20_body">
      <style:paragraph-properties fo:keep-together="always" fo:keep-with-next="always"/>
      <style:text-properties fo:font-size="12pt" style:font-size-asian="12pt" style:font-size-complex="12pt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Лабораторная работа: управление роботом через COM-порт и веб-интерфейс</dc:title>
    <meta:initial-creator>Khusainov AA 4241v</meta:initial-creator>
    <dc:language>ru-RU</dc:language>
    <meta:creation-date>2026-05-20T10:28:54</meta:creation-date>
    <dc:date>2026-05-20T13:43:47.772985829</dc:date>
    <meta:generator>LibreOffice/26.2.3.2$Linux_X86_64 LibreOffice_project/620$Build-2</meta:generator>
    <meta:editing-duration>PT13M40S</meta:editing-duration>
    <meta:editing-cycles>1</meta:editing-cycles>
    <meta:document-statistic meta:table-count="5" meta:image-count="0" meta:object-count="0" meta:page-count="9" meta:paragraph-count="170" meta:word-count="1474" meta:character-count="11606" meta:non-whitespace-character-count="9919"/>
    <meta:user-defined meta:name="AppVersion">12.0000</meta:user-defined>
    <meta:user-defined meta:name="date">20.05.2026</meta:user-defined>
    <meta:template xlink:type="simple" xlink:actuate="onRequest" xlink:title="Normal.dotm" xlink:href=""/>
  </office:meta>
</office:document-meta>
</file>